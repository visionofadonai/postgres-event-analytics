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7771in" table:align="left"/>
    </style:style>
    <style:style style:name="Table1.A" style:family="table-column">
      <style:table-column-properties style:column-width="1.4944in"/>
    </style:style>
    <style:style style:name="Table1.B" style:family="table-column">
      <style:table-column-properties style:column-width="2.282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1278in" table:align="left"/>
    </style:style>
    <style:style style:name="Table2.A" style:family="table-column">
      <style:table-column-properties style:column-width="0.8701in"/>
    </style:style>
    <style:style style:name="Table2.B" style:family="table-column">
      <style:table-column-properties style:column-width="1.257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vent Analytics Project — Learning Summary</text:h>
      <text:h text:style-name="Heading_20_2" text:outline-level="2">Project Goal</text:h>
      <text:p text:style-name="Text_20_body">Build a small backend system that demonstrates practical engineering skills in:</text:p>
      <text:list text:style-name="L1">
        <text:list-item>
          <text:p text:style-name="P1">PostgreSQL database engineering</text:p>
        </text:list-item>
        <text:list-item>
          <text:p text:style-name="P1">Python backend development</text:p>
        </text:list-item>
        <text:list-item>
          <text:p text:style-name="P1">API design</text:p>
        </text:list-item>
        <text:list-item>
          <text:p text:style-name="P1">query optimization and performance analysis</text:p>
        </text:list-item>
        <text:list-item>
          <text:p text:style-name="P1">Linux deployment</text:p>
        </text:list-item>
      </text:list>
      <text:p text:style-name="Text_20_body">The system simulates a simplified <text:span text:style-name="Strong_20_Emphasis">event analytics pipeline</text:span> similar to what many real applications use to track user activity.</text:p>
      <text:p text:style-name="Horizontal_20_Line"/>
      <text:h text:style-name="Heading_20_1" text:outline-level="1">System Architecture</text:h>
      <text:p text:style-name="Text_20_body">Current architecture:</text:p>
      <text:p text:style-name="Preformatted_20_Text"><text:span text:style-name="Source_20_Text">Event Generator Script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reformatted_20_Text"><text:span text:style-name="Source_20_Text">FastAPI Backend API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reformatted_20_Text"><text:span text:style-name="Source_20_Text">PostgreSQL Database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2"><text:span text:style-name="Source_20_Text">Analytics Queries</text:span></text:p>
      <text:p text:style-name="Text_20_body">Compon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Technology</text:p>
            </table:table-cell>
          </table:table-row>
        </table:table-header-rows>
        <table:table-row>
          <table:table-cell table:style-name="Table1.A1" office:value-type="string">
            <text:p text:style-name="Table_20_Contents">Operating System</text:p>
          </table:table-cell>
          <table:table-cell table:style-name="Table1.A1" office:value-type="string">
            <text:p text:style-name="Table_20_Contents">Ubuntu Server (VirtualBox VM)</text:p>
          </table:table-cell>
        </table:table-row>
        <table:table-row>
          <table:table-cell table:style-name="Table1.A1" office:value-type="string">
            <text:p text:style-name="Table_20_Contents">Language</text:p>
          </table:table-cell>
          <table:table-cell table:style-name="Table1.A1" office:value-type="string">
            <text:p text:style-name="Table_20_Contents">Python</text:p>
          </table:table-cell>
        </table:table-row>
        <table:table-row>
          <table:table-cell table:style-name="Table1.A1" office:value-type="string">
            <text:p text:style-name="Table_20_Contents">API Framework</text:p>
          </table:table-cell>
          <table:table-cell table:style-name="Table1.A1" office:value-type="string">
            <text:p text:style-name="Table_20_Contents">FastAPI</text:p>
          </table:table-cell>
        </table:table-row>
        <table:table-row>
          <table:table-cell table:style-name="Table1.A1" office:value-type="string">
            <text:p text:style-name="Table_20_Contents">Database</text:p>
          </table:table-cell>
          <table:table-cell table:style-name="Table1.A1" office:value-type="string">
            <text:p text:style-name="Table_20_Contents">PostgreSQL</text:p>
          </table:table-cell>
        </table:table-row>
        <table:table-row>
          <table:table-cell table:style-name="Table1.A1" office:value-type="string">
            <text:p text:style-name="Table_20_Contents">DB Tools</text:p>
          </table:table-cell>
          <table:table-cell table:style-name="Table1.A1" office:value-type="string">
            <text:p text:style-name="Table_20_Contents">psql / pgAdmin</text:p>
          </table:table-cell>
        </table:table-row>
        <table:table-row>
          <table:table-cell table:style-name="Table1.A1" office:value-type="string">
            <text:p text:style-name="Table_20_Contents">Version Control</text:p>
          </table:table-cell>
          <table:table-cell table:style-name="Table1.A1" office:value-type="string">
            <text:p text:style-name="Table_20_Contents">Git</text:p>
          </table:table-cell>
        </table:table-row>
        <table:table-row>
          <table:table-cell table:style-name="Table1.A1" office:value-type="string">
            <text:p text:style-name="Table_20_Contents">Repository Hosting</text:p>
          </table:table-cell>
          <table:table-cell table:style-name="Table1.A1" office:value-type="string">
            <text:p text:style-name="Table_20_Contents">GitHub</text:p>
          </table:table-cell>
        </table:table-row>
        <table:table-row>
          <table:table-cell table:style-name="Table1.A1" office:value-type="string">
            <text:p text:style-name="Table_20_Contents">Development Access</text:p>
          </table:table-cell>
          <table:table-cell table:style-name="Table1.A1" office:value-type="string">
            <text:p text:style-name="Table_20_Contents">SSH</text:p>
          </table:table-cell>
        </table:table-row>
      </table:table>
      <text:p text:style-name="Horizontal_20_Line"/>
      <text:h text:style-name="Heading_20_1" text:outline-level="1"><text:soft-page-break/>What Has Been Implemented</text:h>
      <text:h text:style-name="Heading_20_2" text:outline-level="2">1. Ubuntu VM development environment</text:h>
      <text:p text:style-name="Text_20_body">You created a development environment using:</text:p>
      <text:list text:style-name="L2">
        <text:list-item>
          <text:p text:style-name="P3">Ubuntu Server</text:p>
        </text:list-item>
        <text:list-item>
          <text:p text:style-name="P3">VirtualBox</text:p>
        </text:list-item>
        <text:list-item>
          <text:p text:style-name="P3">SSH remote access</text:p>
        </text:list-item>
      </text:list>
      <text:p text:style-name="Text_20_body">This simulates how many backend services run on Linux servers.</text:p>
      <text:p text:style-name="Text_20_body">Concepts involved:</text:p>
      <text:list text:style-name="L3">
        <text:list-item>
          <text:p text:style-name="P4">Linux server management</text:p>
        </text:list-item>
        <text:list-item>
          <text:p text:style-name="P4">SSH access</text:p>
        </text:list-item>
        <text:list-item>
          <text:p text:style-name="P4">package installation via apt</text:p>
        </text:list-item>
        <text:list-item>
          <text:p text:style-name="P4">Python environments</text:p>
        </text:list-item>
        <text:list-item>
          <text:p text:style-name="P4">running backend services</text:p>
        </text:list-item>
      </text:list>
      <text:p text:style-name="Horizontal_20_Line"/>
      <text:h text:style-name="Heading_20_1" text:outline-level="1">2. PostgreSQL database setup</text:h>
      <text:p text:style-name="Text_20_body">You installed and configured PostgreSQL and created a working database.</text:p>
      <text:p text:style-name="Text_20_body">Database created:</text:p>
      <text:p text:style-name="P2"><text:span text:style-name="Source_20_Text">event_analytics</text:span></text:p>
      <text:p text:style-name="Text_20_body">Core table:</text:p>
      <text:p text:style-name="P2"><text:span text:style-name="Source_20_Text">events</text:span></text:p>
      <text:p text:style-name="Text_20_body">Schema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lumn</text:p>
            </table:table-cell>
            <table:table-cell table:style-name="Table2.A1" office:value-type="string">
              <text:p text:style-name="Table_20_Heading">type</text:p>
            </table:table-cell>
          </table:table-row>
        </table:table-header-rows>
        <table:table-row>
          <table:table-cell table:style-name="Table2.A1" office:value-type="string">
            <text:p text:style-name="Table_20_Contents">event_id</text:p>
          </table:table-cell>
          <table:table-cell table:style-name="Table2.A1" office:value-type="string">
            <text:p text:style-name="Table_20_Contents">BIGSERIAL</text:p>
          </table:table-cell>
        </table:table-row>
        <table:table-row>
          <table:table-cell table:style-name="Table2.A1" office:value-type="string">
            <text:p text:style-name="Table_20_Contents">user_id</text:p>
          </table:table-cell>
          <table:table-cell table:style-name="Table2.A1" office:value-type="string">
            <text:p text:style-name="Table_20_Contents">UUID</text:p>
          </table:table-cell>
        </table:table-row>
        <table:table-row>
          <table:table-cell table:style-name="Table2.A1" office:value-type="string">
            <text:p text:style-name="Table_20_Contents">event_type</text:p>
          </table:table-cell>
          <table:table-cell table:style-name="Table2.A1" office:value-type="string">
            <text:p text:style-name="Table_20_Contents">TEXT</text:p>
          </table:table-cell>
        </table:table-row>
        <table:table-row>
          <table:table-cell table:style-name="Table2.A1" office:value-type="string">
            <text:p text:style-name="Table_20_Contents">properties</text:p>
          </table:table-cell>
          <table:table-cell table:style-name="Table2.A1" office:value-type="string">
            <text:p text:style-name="Table_20_Contents">JSONB</text:p>
          </table:table-cell>
        </table:table-row>
        <table:table-row>
          <table:table-cell table:style-name="Table2.A1" office:value-type="string">
            <text:p text:style-name="Table_20_Contents">occurred_at</text:p>
          </table:table-cell>
          <table:table-cell table:style-name="Table2.A1" office:value-type="string">
            <text:p text:style-name="Table_20_Contents">TIMESTAMPTZ</text:p>
          </table:table-cell>
        </table:table-row>
      </table:table>
      <text:p text:style-name="Text_20_body">Concepts involved:</text:p>
      <text:list text:style-name="L4">
        <text:list-item>
          <text:p text:style-name="P5">relational schema design</text:p>
        </text:list-item>
        <text:list-item>
          <text:p text:style-name="P5"><text:soft-page-break/>primary keys</text:p>
        </text:list-item>
        <text:list-item>
          <text:p text:style-name="P5">timestamps</text:p>
        </text:list-item>
        <text:list-item>
          <text:p text:style-name="P5">semi-structured data using JSONB</text:p>
        </text:list-item>
      </text:list>
      <text:p text:style-name="Text_20_body">Why JSONB matters:</text:p>
      <text:p text:style-name="Text_20_body">Many event pipelines store dynamic metadata that changes frequently.</text:p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/>"page": "/product/12",</text:span></text:p>
      <text:p text:style-name="Preformatted_20_Text"><text:span text:style-name="Source_20_Text"><text:s/>"value": 0.44</text:span></text:p>
      <text:p text:style-name="P2"><text:span text:style-name="Source_20_Text">}</text:span></text:p>
      <text:p text:style-name="Text_20_body">PostgreSQL's JSONB allows querying flexible event attributes.</text:p>
      <text:p text:style-name="Horizontal_20_Line"/>
      <text:h text:style-name="Heading_20_1" text:outline-level="1">3. Indexing for performance</text:h>
      <text:p text:style-name="Text_20_body">Indexes were added to improve query performance.</text:p>
      <text:p text:style-name="Text_20_body">Examples implemented:</text:p>
      <text:p text:style-name="P2"><text:span text:style-name="Source_20_Text">(event_type, occurred_at)</text:span></text:p>
      <text:p text:style-name="Text_20_body">and</text:p>
      <text:p text:style-name="P2"><text:span text:style-name="Source_20_Text">GIN index on JSONB properties</text:span></text:p>
      <text:p text:style-name="Text_20_body">Concepts involved:</text:p>
      <text:list text:style-name="L5">
        <text:list-item>
          <text:p text:style-name="P6">B-tree indexes</text:p>
        </text:list-item>
        <text:list-item>
          <text:p text:style-name="P6">composite indexes</text:p>
        </text:list-item>
        <text:list-item>
          <text:p text:style-name="P6">JSONB GIN indexes</text:p>
        </text:list-item>
        <text:list-item>
          <text:p text:style-name="P6">query filtering optimization</text:p>
        </text:list-item>
      </text:list>
      <text:p text:style-name="Horizontal_20_Line"/>
      <text:h text:style-name="Heading_20_1" text:outline-level="1">4. Query performance analysis</text:h>
      <text:p text:style-name="Text_20_body">Queries were tested using:</text:p>
      <text:p text:style-name="P2"><text:span text:style-name="Source_20_Text">EXPLAIN ANALYZE</text:span></text:p>
      <text:p text:style-name="Text_20_body">Example query:</text:p>
      <text:p text:style-name="Preformatted_20_Text"><text:span text:style-name="Source_20_Text">SELECT date_trunc('hour', occurred_at), count(*)</text:span></text:p>
      <text:p text:style-name="Preformatted_20_Text"><text:soft-page-break/><text:span text:style-name="Source_20_Text">FROM events</text:span></text:p>
      <text:p text:style-name="Preformatted_20_Text"><text:span text:style-name="Source_20_Text">GROUP BY 1</text:span></text:p>
      <text:p text:style-name="P2"><text:span text:style-name="Source_20_Text">ORDER BY 1;</text:span></text:p>
      <text:p text:style-name="Text_20_body">You observed:</text:p>
      <text:list text:style-name="L6">
        <text:list-item>
          <text:p text:style-name="P7">planning time differences</text:p>
        </text:list-item>
        <text:list-item>
          <text:p text:style-name="P7">execution time differences</text:p>
        </text:list-item>
      </text:list>
      <text:p text:style-name="Text_20_body">Important learning:</text:p>
      <text:p text:style-name="Text_20_body">Adding an index can increase <text:span text:style-name="Strong_20_Emphasis">planning time</text:span> because PostgreSQL evaluates more possible execution plans.</text:p>
      <text:p text:style-name="Text_20_body">However indexes can significantly <text:span text:style-name="Strong_20_Emphasis">reduce execution time</text:span>, which is what matters for performance.</text:p>
      <text:p text:style-name="Text_20_body">Concepts involved:</text:p>
      <text:list text:style-name="L7">
        <text:list-item>
          <text:p text:style-name="P8">query planner</text:p>
        </text:list-item>
        <text:list-item>
          <text:p text:style-name="P8">cost estimation</text:p>
        </text:list-item>
        <text:list-item>
          <text:p text:style-name="P8">sequential scan vs index scan</text:p>
        </text:list-item>
        <text:list-item>
          <text:p text:style-name="P8">planning vs execution time</text:p>
        </text:list-item>
      </text:list>
      <text:p text:style-name="Horizontal_20_Line"/>
      <text:h text:style-name="Heading_20_1" text:outline-level="1">5. Python event generator</text:h>
      <text:p text:style-name="Text_20_body">You implemented a script that generates synthetic events.</text:p>
      <text:p text:style-name="Text_20_body">Purpose:</text:p>
      <text:list text:style-name="L8">
        <text:list-item>
          <text:p text:style-name="P9">simulate user activity</text:p>
        </text:list-item>
        <text:list-item>
          <text:p text:style-name="P9">populate the database</text:p>
        </text:list-item>
        <text:list-item>
          <text:p text:style-name="P9">create realistic workloads for analytics queries</text:p>
        </text:list-item>
      </text:list>
      <text:p text:style-name="Text_20_body">Example event:</text:p>
      <text:p text:style-name="Preformatted_20_Text"><text:span text:style-name="Source_20_Text">{</text:span></text:p>
      <text:p text:style-name="Preformatted_20_Text"><text:span text:style-name="Source_20_Text"><text:s text:c="2"/>"user_id": UUID,</text:span></text:p>
      <text:p text:style-name="Preformatted_20_Text"><text:span text:style-name="Source_20_Text"><text:s text:c="2"/>"event_type": "page_view",</text:span></text:p>
      <text:p text:style-name="Preformatted_20_Text"><text:span text:style-name="Source_20_Text"><text:s text:c="2"/>"properties": {...},</text:span></text:p>
      <text:p text:style-name="Preformatted_20_Text"><text:span text:style-name="Source_20_Text"><text:s text:c="2"/>"occurred_at": timestamp</text:span></text:p>
      <text:p text:style-name="P2"><text:span text:style-name="Source_20_Text">}</text:span></text:p>
      <text:p text:style-name="Text_20_body">Concepts involved:</text:p>
      <text:list text:style-name="L9">
        <text:list-item>
          <text:p text:style-name="P10">batch inserts</text:p>
        </text:list-item>
        <text:list-item>
          <text:p text:style-name="P10">random data generation</text:p>
        </text:list-item>
        <text:list-item>
          <text:p text:style-name="P10"><text:soft-page-break/>workload simulation</text:p>
        </text:list-item>
      </text:list>
      <text:p text:style-name="Text_20_body">This is important because many real systems are tested with <text:span text:style-name="Strong_20_Emphasis">synthetic workloads</text:span>.</text:p>
      <text:p text:style-name="Horizontal_20_Line"/>
      <text:h text:style-name="Heading_20_1" text:outline-level="1">6. FastAPI backend service</text:h>
      <text:p text:style-name="Text_20_body">A REST API was created using FastAPI.</text:p>
      <text:p text:style-name="Text_20_body">Main application file:</text:p>
      <text:p text:style-name="P2"><text:span text:style-name="Source_20_Text">app/main.py</text:span></text:p>
      <text:p text:style-name="Text_20_body">Endpoints implemented:</text:p>
      <text:p text:style-name="Preformatted_20_Text"><text:span text:style-name="Source_20_Text">GET /health</text:span></text:p>
      <text:p text:style-name="Preformatted_20_Text"><text:span text:style-name="Source_20_Text">POST /events</text:span></text:p>
      <text:p text:style-name="Preformatted_20_Text"><text:span text:style-name="Source_20_Text">GET /metrics/events-per-hour</text:span></text:p>
      <text:p text:style-name="P2"><text:span text:style-name="Source_20_Text">GET /metrics/events-by-type</text:span></text:p>
      <text:p text:style-name="Text_20_body">Concepts involved:</text:p>
      <text:list text:style-name="L10">
        <text:list-item>
          <text:p text:style-name="P11">REST API design</text:p>
        </text:list-item>
        <text:list-item>
          <text:p text:style-name="P11">request validation using Pydantic</text:p>
        </text:list-item>
        <text:list-item>
          <text:p text:style-name="P11">JSON APIs</text:p>
        </text:list-item>
        <text:list-item>
          <text:p text:style-name="P11">routing</text:p>
        </text:list-item>
        <text:list-item>
          <text:p text:style-name="P11">backend service architecture</text:p>
        </text:list-item>
      </text:list>
      <text:p text:style-name="Horizontal_20_Line"/>
      <text:h text:style-name="Heading_20_1" text:outline-level="1">7. Database interaction layer</text:h>
      <text:p text:style-name="Text_20_body">The API interacts with PostgreSQL using:</text:p>
      <text:p text:style-name="P2"><text:span text:style-name="Source_20_Text">psycopg2</text:span></text:p>
      <text:p text:style-name="Text_20_body">This layer handles:</text:p>
      <text:list text:style-name="L11">
        <text:list-item>
          <text:p text:style-name="P12">database connections</text:p>
        </text:list-item>
        <text:list-item>
          <text:p text:style-name="P12">executing queries</text:p>
        </text:list-item>
        <text:list-item>
          <text:p text:style-name="P12">inserting events</text:p>
        </text:list-item>
      </text:list>
      <text:p text:style-name="Text_20_body">Concepts involved:</text:p>
      <text:list text:style-name="L12">
        <text:list-item>
          <text:p text:style-name="P13">database drivers</text:p>
        </text:list-item>
        <text:list-item>
          <text:p text:style-name="P13">connection management</text:p>
        </text:list-item>
        <text:list-item>
          <text:p text:style-name="P13"><text:soft-page-break/>parameterized SQL queries</text:p>
        </text:list-item>
      </text:list>
      <text:p text:style-name="Horizontal_20_Line"/>
      <text:h text:style-name="Heading_20_1" text:outline-level="1">8. Git and GitHub integration</text:h>
      <text:p text:style-name="Text_20_body">You initialized a Git repository and pushed the project to GitHub.</text:p>
      <text:p text:style-name="Text_20_body">Concepts involved:</text:p>
      <text:list text:style-name="L13">
        <text:list-item>
          <text:p text:style-name="P14">version control</text:p>
        </text:list-item>
        <text:list-item>
          <text:p text:style-name="P14">commit history</text:p>
        </text:list-item>
        <text:list-item>
          <text:p text:style-name="P14">repository structure</text:p>
        </text:list-item>
        <text:list-item>
          <text:p text:style-name="P14">GitHub project visibility</text:p>
        </text:list-item>
      </text:list>
      <text:p text:style-name="Text_20_body">Git commits now track the evolution of the system.</text:p>
      <text:p text:style-name="Horizontal_20_Line"/>
      <text:h text:style-name="Heading_20_1" text:outline-level="1">9. Documentation and project structure</text:h>
      <text:p text:style-name="Text_20_body">You organized the repository into logical components:</text:p>
      <text:p text:style-name="Preformatted_20_Text"><text:span text:style-name="Source_20_Text">app/</text:span></text:p>
      <text:p text:style-name="Preformatted_20_Text"><text:span text:style-name="Source_20_Text">scripts/</text:span></text:p>
      <text:p text:style-name="Preformatted_20_Text"><text:span text:style-name="Source_20_Text">sql/</text:span></text:p>
      <text:p text:style-name="Preformatted_20_Text"><text:span text:style-name="Source_20_Text">docs/</text:span></text:p>
      <text:p text:style-name="P2"><text:span text:style-name="Source_20_Text">perf/</text:span></text:p>
      <text:p text:style-name="Text_20_body">This structure resembles how production backend repositories are organized.</text:p>
      <text:p text:style-name="Text_20_body">Concepts involved:</text:p>
      <text:list text:style-name="L14">
        <text:list-item>
          <text:p text:style-name="P15">modular code organization</text:p>
        </text:list-item>
        <text:list-item>
          <text:p text:style-name="P15">documentation practices</text:p>
        </text:list-item>
        <text:list-item>
          <text:p text:style-name="P15">reproducible project setup</text:p>
        </text:list-item>
      </text:list>
      <text:p text:style-name="Horizontal_20_Line"/>
      <text:h text:style-name="Heading_20_1" text:outline-level="1">What Engineering Skills This Demonstrates</text:h>
      <text:p text:style-name="Text_20_body">Your project now demonstrates practical experience with:</text:p>
      <text:p text:style-name="Text_20_body">Database engineering</text:p>
      <text:list text:style-name="L15">
        <text:list-item>
          <text:p text:style-name="P16">schema design</text:p>
        </text:list-item>
        <text:list-item>
          <text:p text:style-name="P16">indexing</text:p>
        </text:list-item>
        <text:list-item>
          <text:p text:style-name="P16"><text:soft-page-break/>query performance analysis</text:p>
        </text:list-item>
      </text:list>
      <text:p text:style-name="Text_20_body">Backend development</text:p>
      <text:list text:style-name="L16">
        <text:list-item>
          <text:p text:style-name="P17">REST API design</text:p>
        </text:list-item>
        <text:list-item>
          <text:p text:style-name="P17">Python backend services</text:p>
        </text:list-item>
      </text:list>
      <text:p text:style-name="Text_20_body">System architecture</text:p>
      <text:list text:style-name="L17">
        <text:list-item>
          <text:p text:style-name="P18">event ingestion pipelines</text:p>
        </text:list-item>
        <text:list-item>
          <text:p text:style-name="P18">analytics query patterns</text:p>
        </text:list-item>
      </text:list>
      <text:p text:style-name="Text_20_body">Software engineering</text:p>
      <text:list text:style-name="L18">
        <text:list-item>
          <text:p text:style-name="P19">Git workflows</text:p>
        </text:list-item>
        <text:list-item>
          <text:p text:style-name="P19">documentation</text:p>
        </text:list-item>
        <text:list-item>
          <text:p text:style-name="P19">structured repositories</text:p>
        </text:list-item>
      </text:list>
      <text:p text:style-name="Text_20_body">Infrastructure basics</text:p>
      <text:list text:style-name="L19">
        <text:list-item>
          <text:p text:style-name="P20">Linux server environments</text:p>
        </text:list-item>
        <text:list-item>
          <text:p text:style-name="P20">SSH-based development</text:p>
        </text:list-item>
      </text:list>
      <text:p text:style-name="Horizontal_20_Line"/>
      <text:h text:style-name="Heading_20_1" text:outline-level="1">What To Study More Deeply</text:h>
      <text:p text:style-name="Text_20_body">These topics will make this project much stronger.</text:p>
      <text:h text:style-name="Heading_20_2" text:outline-level="2">PostgreSQL</text:h>
      <text:p text:style-name="Text_20_body">Focus on:</text:p>
      <text:list text:style-name="L20">
        <text:list-item>
          <text:p text:style-name="P21">index types</text:p>
        </text:list-item>
        <text:list-item>
          <text:p text:style-name="P21">query planner</text:p>
        </text:list-item>
        <text:list-item>
          <text:p text:style-name="P21">VACUUM and ANALYZE</text:p>
        </text:list-item>
        <text:list-item>
          <text:p text:style-name="P21">table partitioning</text:p>
        </text:list-item>
        <text:list-item>
          <text:p text:style-name="P21">connection pooling</text:p>
        </text:list-item>
        <text:list-item>
          <text:p text:style-name="P21">transaction isolation</text:p>
        </text:list-item>
      </text:list>
      <text:p text:style-name="Text_20_body">Recommended study topics:</text:p>
      <text:p text:style-name="Preformatted_20_Text"><text:span text:style-name="Source_20_Text">PostgreSQL execution plans</text:span></text:p>
      <text:p text:style-name="Preformatted_20_Text"><text:span text:style-name="Source_20_Text">PostgreSQL partitioned tables</text:span></text:p>
      <text:p text:style-name="P2"><text:span text:style-name="Source_20_Text">PostgreSQL JSONB querying</text:span></text:p>
      <text:p text:style-name="Horizontal_20_Line"><text:soft-page-break/></text:p>
      <text:h text:style-name="Heading_20_2" text:outline-level="2">Backend architecture</text:h>
      <text:p text:style-name="Text_20_body">Focus on:</text:p>
      <text:list text:style-name="L21">
        <text:list-item>
          <text:p text:style-name="P22">API architecture</text:p>
        </text:list-item>
        <text:list-item>
          <text:p text:style-name="P22">dependency injection</text:p>
        </text:list-item>
        <text:list-item>
          <text:p text:style-name="P22">background jobs</text:p>
        </text:list-item>
        <text:list-item>
          <text:p text:style-name="P22">connection pools</text:p>
        </text:list-item>
        <text:list-item>
          <text:p text:style-name="P22">async database access</text:p>
        </text:list-item>
      </text:list>
      <text:p text:style-name="Text_20_body">Topics:</text:p>
      <text:p text:style-name="Preformatted_20_Text"><text:span text:style-name="Source_20_Text">FastAPI async architecture</text:span></text:p>
      <text:p text:style-name="Preformatted_20_Text"><text:span text:style-name="Source_20_Text">SQLAlchemy</text:span></text:p>
      <text:p text:style-name="P2"><text:span text:style-name="Source_20_Text">connection pooling</text:span></text:p>
      <text:p text:style-name="Horizontal_20_Line"/>
      <text:h text:style-name="Heading_20_2" text:outline-level="2">Data systems</text:h>
      <text:p text:style-name="Text_20_body">This project resembles simplified versions of systems used for:</text:p>
      <text:list text:style-name="L22">
        <text:list-item>
          <text:p text:style-name="P23">event tracking</text:p>
        </text:list-item>
        <text:list-item>
          <text:p text:style-name="P23">analytics pipelines</text:p>
        </text:list-item>
        <text:list-item>
          <text:p text:style-name="P23">logging systems</text:p>
        </text:list-item>
        <text:list-item>
          <text:p text:style-name="P23">telemetry collection</text:p>
        </text:list-item>
      </text:list>
      <text:p text:style-name="Text_20_body">Understanding real systems like:</text:p>
      <text:p text:style-name="Preformatted_20_Text"><text:span text:style-name="Source_20_Text">Segment</text:span></text:p>
      <text:p text:style-name="Preformatted_20_Text"><text:span text:style-name="Source_20_Text">Snowplow</text:span></text:p>
      <text:p text:style-name="Preformatted_20_Text"><text:span text:style-name="Source_20_Text">ClickHouse</text:span></text:p>
      <text:p text:style-name="P2"><text:span text:style-name="Source_20_Text">Kafka pipelines</text:span></text:p>
      <text:p text:style-name="Text_20_body">will deepen your understanding.</text:p>
      <text:p text:style-name="Horizontal_20_Line"/>
      <text:h text:style-name="Heading_20_1" text:outline-level="1">What the System Can Do Right Now</text:h>
      <text:p text:style-name="Text_20_body">Current capabilities:</text:p>
      <text:list text:style-name="L23">
        <text:list-item>
          <text:p text:style-name="P24">ingest events via API</text:p>
        </text:list-item>
        <text:list-item>
          <text:p text:style-name="P24">generate synthetic workload</text:p>
        </text:list-item>
        <text:list-item>
          <text:p text:style-name="P24"><text:soft-page-break/>store events in PostgreSQL</text:p>
        </text:list-item>
        <text:list-item>
          <text:p text:style-name="P24">query analytics metrics</text:p>
        </text:list-item>
        <text:list-item>
          <text:p text:style-name="P24">measure query performance</text:p>
        </text:list-item>
      </text:list>
      <text:p text:style-name="Text_20_body">This represents a <text:span text:style-name="Strong_20_Emphasis">basic event analytics service</text:span>.</text:p>
      <text:p text:style-name="Horizontal_20_Line"/>
      <text:h text:style-name="Heading_20_1" text:outline-level="1">Key Learning Outcome</text:h>
      <text:p text:style-name="Text_20_body">The most important takeaway so far:</text:p>
      <text:p text:style-name="Text_20_body">You have moved from:</text:p>
      <text:p text:style-name="P2"><text:span text:style-name="Source_20_Text">IT support environment</text:span></text:p>
      <text:p text:style-name="Text_20_body">to building:</text:p>
      <text:p text:style-name="P2"><text:span text:style-name="Source_20_Text">a working backend data system</text:span></text:p>
      <text:p text:style-name="Text_20_body">That transition — from <text:span text:style-name="Strong_20_Emphasis">operating systems to building systems</text:span> — is the key step toward backend or data engineering roles.</text:p>
      <text:p text:style-name="Horizontal_20_Line"/>
      <text:h text:style-name="Heading_20_1" text:outline-level="1">Next Major Technical Upgrade</text:h>
      <text:p text:style-name="Text_20_body">The next improvement that will dramatically increase your understanding is:</text:p>
      <text:p text:style-name="Text_20_body"><text:span text:style-name="Strong_20_Emphasis">PostgreSQL time-partitioned tables</text:span></text:p>
      <text:p text:style-name="Text_20_body">This is commonly used for:</text:p>
      <text:list text:style-name="L24">
        <text:list-item>
          <text:p text:style-name="P25">analytics pipelines</text:p>
        </text:list-item>
        <text:list-item>
          <text:p text:style-name="P25">logging systems</text:p>
        </text:list-item>
        <text:list-item>
          <text:p text:style-name="P25">telemetry platforms</text:p>
        </text:list-item>
      </text:list>
      <text:p text:style-name="Text_20_body">Learning this will deepen your understanding of:</text:p>
      <text:list text:style-name="L25">
        <text:list-item>
          <text:p text:style-name="P26">large datasets</text:p>
        </text:list-item>
        <text:list-item>
          <text:p text:style-name="P26">storage design</text:p>
        </text:list-item>
        <text:list-item>
          <text:p text:style-name="P26">query optimization</text:p>
        </text:list-item>
        <text:list-item>
          <text:p text:style-name="P26">data lifecycle management</text:p>
        </text:list-item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21:14:34.701867288</meta:creation-date>
    <dc:date>2026-03-11T21:16:35.819180258</dc:date>
    <meta:editing-duration>PT2M2S</meta:editing-duration>
    <meta:editing-cycles>1</meta:editing-cycles>
    <meta:document-statistic meta:table-count="2" meta:image-count="0" meta:object-count="0" meta:page-count="9" meta:paragraph-count="262" meta:word-count="881" meta:character-count="5970" meta:non-whitespace-character-count="5380"/>
    <meta:generator>LibreOffice/25.8.4.2$Linux_X86_64 LibreOffice_project/580$Build-2</meta:generator>
  </office:meta>
</office:document-meta>
</file>