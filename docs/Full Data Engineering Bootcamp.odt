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7479in" table:align="left"/>
    </style:style>
    <style:style style:name="Table1.A" style:family="table-column">
      <style:table-column-properties style:column-width="0.4444in"/>
    </style:style>
    <style:style style:name="Table1.B" style:family="table-column">
      <style:table-column-properties style:column-width="0.8743in"/>
    </style:style>
    <style:style style:name="Table1.C" style:family="table-column">
      <style:table-column-properties style:column-width="0.8833in"/>
    </style:style>
    <style:style style:name="Table1.D" style:family="table-column">
      <style:table-column-properties style:column-width="0.545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Heading_20_1">
      <style:paragraph-properties fo:margin-top="0in" fo:margin-bottom="0.0972in" style:contextual-spacing="false" fo:line-height="115%" fo:break-before="page"/>
    </style:style>
    <style:style style:name="P11" style:family="paragraph" style:parent-style-name="Heading_20_3">
      <style:paragraph-properties fo:margin-top="0in" fo:margin-bottom="0.0972in" style:contextual-spacing="false" fo:line-height="115%"/>
    </style:style>
    <style:style style:name="P12" style:family="paragraph" style:parent-style-name="Preformatted_20_Text">
      <style:paragraph-properties fo:margin-top="0in" fo:margin-bottom="0.0972in" style:contextual-spacing="false" fo:line-height="115%"/>
    </style:style>
    <style:style style:name="P13" style:family="paragraph" style:parent-style-name="Text_20_body" style:list-style-name="L9"/>
    <style:style style:name="P14" style:family="paragraph" style:parent-style-name="Horizontal_20_Line">
      <style:paragraph-properties fo:margin-top="0in" fo:margin-bottom="0.0972in" style:contextual-spacing="false" fo:line-height="115%"/>
    </style:style>
    <style:style style:name="P15" style:family="paragraph" style:parent-style-name="Heading_20_1">
      <style:paragraph-properties fo:margin-top="0in" fo:margin-bottom="0.0972in" style:contextual-spacing="false" fo:line-height="115%"/>
    </style:style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Heading_20_2">
      <style:paragraph-properties fo:margin-top="0in" fo:margin-bottom="0.0972in" style:contextual-spacing="false" fo:line-height="115%"/>
    </style:style>
    <style:style style:name="P26" style:family="paragraph" style:parent-style-name="Text_20_body" style:list-style-name="L19"/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P30" style:family="paragraph" style:parent-style-name="Text_20_body" style:list-style-name="L2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gineering Mastery Roadmap</text:h>
      <text:h text:style-name="Heading_20_3" text:outline-level="3">Project: Event Analytics System</text:h>
      <text:p text:style-name="Text_20_body">Goal:</text:p>
      <text:p text:style-name="Text_20_body">Move from <text:span text:style-name="Strong_20_Emphasis">“working project” → “deep systems understanding.”</text:span></text:p>
      <text:p text:style-name="Text_20_body">You want to understand:</text:p>
      <text:p text:style-name="Preformatted_20_Text"><text:span text:style-name="Source_20_Text">databases</text:span></text:p>
      <text:p text:style-name="Preformatted_20_Text"><text:span text:style-name="Source_20_Text">backend architecture</text:span></text:p>
      <text:p text:style-name="Preformatted_20_Text"><text:span text:style-name="Source_20_Text">performance engineering</text:span></text:p>
      <text:p text:style-name="Preformatted_20_Text"><text:span text:style-name="Source_20_Text">data systems</text:span></text:p>
      <text:p text:style-name="P1"><text:span text:style-name="Source_20_Text">production infrastructure</text:span></text:p>
      <text:p text:style-name="Horizontal_20_Line"/>
      <text:h text:style-name="Heading_20_1" text:outline-level="1">Phase 1 — PostgreSQL Internals Mastery</text:h>
      <text:p text:style-name="Text_20_body">Your system already uses PostgreSQL.</text:p>
      <text:p text:style-name="Text_20_body">Now you need to <text:span text:style-name="Strong_20_Emphasis">understand why it behaves the way it does.</text:span></text:p>
      <text:p text:style-name="Horizontal_20_Line"/>
      <text:h text:style-name="Heading_20_1" text:outline-level="1">What To Study</text:h>
      <text:p text:style-name="Text_20_body">Core database internals:</text:p>
      <text:p text:style-name="Preformatted_20_Text"><text:span text:style-name="Source_20_Text">PostgreSQL query planner</text:span></text:p>
      <text:p text:style-name="Preformatted_20_Text"><text:span text:style-name="Source_20_Text">execution plans</text:span></text:p>
      <text:p text:style-name="Preformatted_20_Text"><text:span text:style-name="Source_20_Text">B-tree indexes</text:span></text:p>
      <text:p text:style-name="Preformatted_20_Text"><text:span text:style-name="Source_20_Text">GIN indexes</text:span></text:p>
      <text:p text:style-name="Preformatted_20_Text"><text:span text:style-name="Source_20_Text">sequential scans</text:span></text:p>
      <text:p text:style-name="Preformatted_20_Text"><text:span text:style-name="Source_20_Text">index scans</text:span></text:p>
      <text:p text:style-name="P1"><text:span text:style-name="Source_20_Text">bitmap scans</text:span></text:p>
      <text:p text:style-name="Text_20_body">Important topics:</text:p>
      <text:p text:style-name="Preformatted_20_Text"><text:span text:style-name="Source_20_Text">MVCC (multi-version concurrency control)</text:span></text:p>
      <text:p text:style-name="Preformatted_20_Text"><text:span text:style-name="Source_20_Text">heap storage</text:span></text:p>
      <text:p text:style-name="Preformatted_20_Text"><text:span text:style-name="Source_20_Text">visibility map</text:span></text:p>
      <text:p text:style-name="Preformatted_20_Text"><text:span text:style-name="Source_20_Text">autovacuum</text:span></text:p>
      <text:p text:style-name="P1"><text:span text:style-name="Source_20_Text">ANALYZE statistics</text:span></text:p>
      <text:p text:style-name="Text_20_body">Recommended resources:</text:p>
      <text:list text:style-name="L1">
        <text:list-item>
          <text:p text:style-name="P2">PostgreSQL docs: Query Planning</text:p>
        </text:list-item>
        <text:list-item>
          <text:p text:style-name="P2">Use The Index Luke</text:p>
        </text:list-item>
        <text:list-item>
          <text:p text:style-name="P2"><text:soft-page-break/>PostgreSQL Internals blog series</text:p>
        </text:list-item>
      </text:list>
      <text:p text:style-name="Horizontal_20_Line"/>
      <text:h text:style-name="Heading_20_1" text:outline-level="1">Experiments To Run</text:h>
      <text:h text:style-name="Heading_20_3" text:outline-level="3">Experiment 1 — Index vs No Index</text:h>
      <text:p text:style-name="Text_20_body">Create 1M+ events.</text:p>
      <text:p text:style-name="Text_20_body">Run:</text:p>
      <text:p text:style-name="Preformatted_20_Text"><text:span text:style-name="Source_20_Text">SELECT count(*)</text:span></text:p>
      <text:p text:style-name="Preformatted_20_Text"><text:span text:style-name="Source_20_Text">FROM events</text:span></text:p>
      <text:p text:style-name="P1"><text:span text:style-name="Source_20_Text">WHERE event_type = 'page_view';</text:span></text:p>
      <text:p text:style-name="Text_20_body">Measure:</text:p>
      <text:p text:style-name="P1"><text:span text:style-name="Source_20_Text">EXPLAIN ANALYZE</text:span></text:p>
      <text:p text:style-name="Text_20_body">Test cases:</text:p>
      <text:p text:style-name="Preformatted_20_Text"><text:span text:style-name="Source_20_Text">no index</text:span></text:p>
      <text:p text:style-name="Preformatted_20_Text"><text:span text:style-name="Source_20_Text">index on event_type</text:span></text:p>
      <text:p text:style-name="P1"><text:span text:style-name="Source_20_Text">composite index</text:span></text:p>
      <text:p text:style-name="Text_20_body">Record:</text:p>
      <text:p text:style-name="Preformatted_20_Text"><text:span text:style-name="Source_20_Text">planning time</text:span></text:p>
      <text:p text:style-name="Preformatted_20_Text"><text:span text:style-name="Source_20_Text">execution time</text:span></text:p>
      <text:p text:style-name="P1"><text:span text:style-name="Source_20_Text">scan type</text:span></text:p>
      <text:p text:style-name="Horizontal_20_Line"/>
      <text:h text:style-name="Heading_20_3" text:outline-level="3">Experiment 2 — JSONB Query Performance</text:h>
      <text:p text:style-name="Text_20_body">Run queries:</text:p>
      <text:p text:style-name="Preformatted_20_Text"><text:span text:style-name="Source_20_Text">SELECT *</text:span></text:p>
      <text:p text:style-name="Preformatted_20_Text"><text:span text:style-name="Source_20_Text">FROM events</text:span></text:p>
      <text:p text:style-name="P1"><text:span text:style-name="Source_20_Text">WHERE properties-&gt;&gt;'page' = '/product/12';</text:span></text:p>
      <text:p text:style-name="Text_20_body">Test:</text:p>
      <text:p text:style-name="Preformatted_20_Text"><text:span text:style-name="Source_20_Text">no index</text:span></text:p>
      <text:p text:style-name="Preformatted_20_Text"><text:span text:style-name="Source_20_Text">GIN index</text:span></text:p>
      <text:p text:style-name="P1"><text:span text:style-name="Source_20_Text">expression index</text:span></text:p>
      <text:p text:style-name="Text_20_body">Measure performance differences.</text:p>
      <text:p text:style-name="Horizontal_20_Line"/>
      <text:h text:style-name="Heading_20_3" text:outline-level="3"><text:soft-page-break/>Experiment 3 — Query Planner Behavior</text:h>
      <text:p text:style-name="Text_20_body">Force different scans:</text:p>
      <text:p text:style-name="P1"><text:span text:style-name="Source_20_Text">SET enable_seqscan = off;</text:span></text:p>
      <text:p text:style-name="Text_20_body">Observe:</text:p>
      <text:p text:style-name="P1"><text:span text:style-name="Source_20_Text">how planner decisions change</text:span></text:p>
      <text:p text:style-name="Horizontal_20_Line"/>
      <text:h text:style-name="Heading_20_1" text:outline-level="1">Questions You Must Answer</text:h>
      <text:p text:style-name="Text_20_body">You cannot claim database mastery until you can answer these:</text:p>
      <text:list text:style-name="L2">
        <text:list-item>
          <text:p text:style-name="P3">Why does PostgreSQL sometimes choose <text:span text:style-name="Strong_20_Emphasis">sequential scans even when indexes exist?</text:span></text:p>
        </text:list-item>
        <text:list-item>
          <text:p text:style-name="P3">What determines <text:span text:style-name="Strong_20_Emphasis">index selectivity</text:span>?</text:p>
        </text:list-item>
        <text:list-item>
          <text:p text:style-name="P3">When is a <text:span text:style-name="Strong_20_Emphasis">composite index better than multiple indexes?</text:span></text:p>
        </text:list-item>
        <text:list-item>
          <text:p text:style-name="P3">Why do JSONB GIN indexes behave differently from B-tree indexes?</text:p>
        </text:list-item>
        <text:list-item>
          <text:p text:style-name="P3">What does the <text:span text:style-name="Strong_20_Emphasis">cost value</text:span> in EXPLAIN represent?</text:p>
        </text:list-item>
      </text:list>
      <text:p text:style-name="Horizontal_20_Line"/>
      <text:h text:style-name="Heading_20_1" text:outline-level="1">Phase 2 — Data Architecture &amp; Storage Design</text:h>
      <text:p text:style-name="Text_20_body">Right now the system stores all events in one table.</text:p>
      <text:p text:style-name="Text_20_body">Real systems cannot do that.</text:p>
      <text:p text:style-name="Horizontal_20_Line"/>
      <text:h text:style-name="Heading_20_1" text:outline-level="1">What To Study</text:h>
      <text:p text:style-name="Preformatted_20_Text"><text:span text:style-name="Source_20_Text">table partitioning</text:span></text:p>
      <text:p text:style-name="Preformatted_20_Text"><text:span text:style-name="Source_20_Text">time-series storage</text:span></text:p>
      <text:p text:style-name="Preformatted_20_Text"><text:span text:style-name="Source_20_Text">data retention policies</text:span></text:p>
      <text:p text:style-name="Preformatted_20_Text"><text:span text:style-name="Source_20_Text">write amplification</text:span></text:p>
      <text:p text:style-name="P1"><text:span text:style-name="Source_20_Text">hot vs cold data</text:span></text:p>
      <text:p text:style-name="Text_20_body">Important PostgreSQL features:</text:p>
      <text:p text:style-name="Preformatted_20_Text"><text:span text:style-name="Source_20_Text">partitioned tables</text:span></text:p>
      <text:p text:style-name="Preformatted_20_Text"><text:span text:style-name="Source_20_Text">range partitioning</text:span></text:p>
      <text:p text:style-name="P1"><text:span text:style-name="Source_20_Text">partition pruning</text:span></text:p>
      <text:p text:style-name="Horizontal_20_Line"/>
      <text:h text:style-name="Heading_20_1" text:outline-level="1"><text:soft-page-break/>Experiments To Run</text:h>
      <text:h text:style-name="Heading_20_3" text:outline-level="3">Experiment 4 — Time Partitioning</text:h>
      <text:p text:style-name="Text_20_body">Convert:</text:p>
      <text:p text:style-name="P1"><text:span text:style-name="Source_20_Text">events</text:span></text:p>
      <text:p text:style-name="Text_20_body">into</text:p>
      <text:p text:style-name="Preformatted_20_Text"><text:span text:style-name="Source_20_Text">events_2026_03</text:span></text:p>
      <text:p text:style-name="P1"><text:span text:style-name="Source_20_Text">events_2026_04</text:span></text:p>
      <text:p text:style-name="Text_20_body">Use:</text:p>
      <text:p text:style-name="P1"><text:span text:style-name="Source_20_Text">PARTITION BY RANGE (occurred_at)</text:span></text:p>
      <text:p text:style-name="Text_20_body">Insert data across months.</text:p>
      <text:p text:style-name="Text_20_body">Measure queries:</text:p>
      <text:p text:style-name="Preformatted_20_Text"><text:span text:style-name="Source_20_Text">events last hour</text:span></text:p>
      <text:p text:style-name="Preformatted_20_Text"><text:span text:style-name="Source_20_Text">events last month</text:span></text:p>
      <text:p text:style-name="P1"><text:span text:style-name="Source_20_Text">events last year</text:span></text:p>
      <text:p text:style-name="Text_20_body">Observe:</text:p>
      <text:p text:style-name="Preformatted_20_Text"><text:span text:style-name="Source_20_Text">partition pruning</text:span></text:p>
      <text:p text:style-name="P1"><text:span text:style-name="Source_20_Text">query speed</text:span></text:p>
      <text:p text:style-name="Horizontal_20_Line"/>
      <text:h text:style-name="Heading_20_3" text:outline-level="3">Experiment 5 — Partition Size Stress Test</text:h>
      <text:p text:style-name="Text_20_body">Generate:</text:p>
      <text:p text:style-name="Preformatted_20_Text"><text:span text:style-name="Source_20_Text">5 million</text:span></text:p>
      <text:p text:style-name="Preformatted_20_Text"><text:span text:style-name="Source_20_Text">10 million</text:span></text:p>
      <text:p text:style-name="P1"><text:span text:style-name="Source_20_Text">20 million events</text:span></text:p>
      <text:p text:style-name="Text_20_body">Compare performance:</text:p>
      <text:p text:style-name="Preformatted_20_Text"><text:span text:style-name="Source_20_Text">single table</text:span></text:p>
      <text:p text:style-name="P1"><text:span text:style-name="Source_20_Text">partitioned table</text:span></text:p>
      <text:p text:style-name="Horizontal_20_Line"/>
      <text:h text:style-name="Heading_20_1" text:outline-level="1">Questions To Answer</text:h>
      <text:list text:style-name="L3">
        <text:list-item>
          <text:p text:style-name="P4">When does partitioning <text:span text:style-name="Strong_20_Emphasis">help performance</text:span>?</text:p>
        </text:list-item>
        <text:list-item>
          <text:p text:style-name="P4">When does it <text:span text:style-name="Strong_20_Emphasis">not help</text:span>?</text:p>
        </text:list-item>
        <text:list-item>
          <text:p text:style-name="P4"><text:soft-page-break/>What is <text:span text:style-name="Strong_20_Emphasis">partition pruning</text:span>?</text:p>
        </text:list-item>
        <text:list-item>
          <text:p text:style-name="P4">How large can a PostgreSQL table become before problems appear?</text:p>
        </text:list-item>
        <text:list-item>
          <text:p text:style-name="P4">What are the downsides of partitioning?</text:p>
        </text:list-item>
      </text:list>
      <text:p text:style-name="Horizontal_20_Line"/>
      <text:h text:style-name="Heading_20_1" text:outline-level="1">Phase 3 — Backend Engineering Architecture</text:h>
      <text:p text:style-name="Text_20_body">Your API works — but production systems require stronger design.</text:p>
      <text:p text:style-name="Horizontal_20_Line"/>
      <text:h text:style-name="Heading_20_1" text:outline-level="1">What To Study</text:h>
      <text:p text:style-name="Preformatted_20_Text"><text:span text:style-name="Source_20_Text">FastAPI async architecture</text:span></text:p>
      <text:p text:style-name="Preformatted_20_Text"><text:span text:style-name="Source_20_Text">connection pooling</text:span></text:p>
      <text:p text:style-name="Preformatted_20_Text"><text:span text:style-name="Source_20_Text">dependency injection</text:span></text:p>
      <text:p text:style-name="Preformatted_20_Text"><text:span text:style-name="Source_20_Text">repository pattern</text:span></text:p>
      <text:p text:style-name="P1"><text:span text:style-name="Source_20_Text">service layer architecture</text:span></text:p>
      <text:p text:style-name="Text_20_body">Important libraries:</text:p>
      <text:p text:style-name="Preformatted_20_Text"><text:span text:style-name="Source_20_Text">asyncpg</text:span></text:p>
      <text:p text:style-name="Preformatted_20_Text"><text:span text:style-name="Source_20_Text">SQLAlchemy</text:span></text:p>
      <text:p text:style-name="P1"><text:span text:style-name="Source_20_Text">pydantic models</text:span></text:p>
      <text:p text:style-name="Horizontal_20_Line"/>
      <text:h text:style-name="Heading_20_1" text:outline-level="1">Experiments To Run</text:h>
      <text:h text:style-name="Heading_20_3" text:outline-level="3">Experiment 6 — Connection Pooling</text:h>
      <text:p text:style-name="Text_20_body">Replace raw psycopg2 connections with:</text:p>
      <text:p text:style-name="P1"><text:span text:style-name="Source_20_Text">asyncpg connection pool</text:span></text:p>
      <text:p text:style-name="Text_20_body">Load test:</text:p>
      <text:p text:style-name="P1"><text:span text:style-name="Source_20_Text">1000 concurrent requests</text:span></text:p>
      <text:p text:style-name="Text_20_body">Measure:</text:p>
      <text:p text:style-name="Preformatted_20_Text"><text:span text:style-name="Source_20_Text">latency</text:span></text:p>
      <text:p text:style-name="Preformatted_20_Text"><text:span text:style-name="Source_20_Text">throughput</text:span></text:p>
      <text:p text:style-name="P1"><text:span text:style-name="Source_20_Text">database connections</text:span></text:p>
      <text:p text:style-name="Horizontal_20_Line"/>
      <text:h text:style-name="Heading_20_3" text:outline-level="3"><text:soft-page-break/>Experiment 7 — API Latency Profiling</text:h>
      <text:p text:style-name="Text_20_body">Use:</text:p>
      <text:p text:style-name="Preformatted_20_Text"><text:span text:style-name="Source_20_Text">wrk</text:span></text:p>
      <text:p text:style-name="Preformatted_20_Text"><text:span text:style-name="Source_20_Text">hey</text:span></text:p>
      <text:p text:style-name="P1"><text:span text:style-name="Source_20_Text">locust</text:span></text:p>
      <text:p text:style-name="Text_20_body">Load test endpoint:</text:p>
      <text:p text:style-name="P1"><text:span text:style-name="Source_20_Text">POST /events</text:span></text:p>
      <text:p text:style-name="Text_20_body">Measure:</text:p>
      <text:p text:style-name="Preformatted_20_Text"><text:span text:style-name="Source_20_Text">requests/sec</text:span></text:p>
      <text:p text:style-name="Preformatted_20_Text"><text:span text:style-name="Source_20_Text">p95 latency</text:span></text:p>
      <text:p text:style-name="Preformatted_20_Text"><text:span text:style-name="Source_20_Text">CPU usage</text:span></text:p>
      <text:p text:style-name="P1"><text:span text:style-name="Source_20_Text">DB connections</text:span></text:p>
      <text:p text:style-name="Horizontal_20_Line"/>
      <text:h text:style-name="Heading_20_1" text:outline-level="1">Questions To Answer</text:h>
      <text:list text:style-name="L4">
        <text:list-item>
          <text:p text:style-name="P5">Why do APIs fail without connection pooling?</text:p>
        </text:list-item>
        <text:list-item>
          <text:p text:style-name="P5">What is the difference between:</text:p>
        </text:list-item>
      </text:list>
      <text:p text:style-name="Preformatted_20_Text"><text:span text:style-name="Source_20_Text">sync IO</text:span></text:p>
      <text:p text:style-name="P1"><text:span text:style-name="Source_20_Text">async IO</text:span></text:p>
      <text:list text:style-name="L5">
        <text:list-item>
          <text:p text:style-name="P6">What limits API throughput:</text:p>
        </text:list-item>
      </text:list>
      <text:p text:style-name="Preformatted_20_Text"><text:span text:style-name="Source_20_Text">CPU</text:span></text:p>
      <text:p text:style-name="Preformatted_20_Text"><text:span text:style-name="Source_20_Text">network</text:span></text:p>
      <text:p text:style-name="P1"><text:span text:style-name="Source_20_Text">database</text:span></text:p>
      <text:p text:style-name="Horizontal_20_Line"/>
      <text:h text:style-name="Heading_20_1" text:outline-level="1">Phase 4 — Data Pipeline Engineering</text:h>
      <text:p text:style-name="Text_20_body">Your event generator simulates traffic.</text:p>
      <text:p text:style-name="Text_20_body">Now turn it into a <text:span text:style-name="Strong_20_Emphasis">mini data pipeline.</text:span></text:p>
      <text:p text:style-name="Horizontal_20_Line"/>
      <text:h text:style-name="Heading_20_1" text:outline-level="1">What To Study</text:h>
      <text:p text:style-name="Preformatted_20_Text"><text:span text:style-name="Source_20_Text">event ingestion architecture</text:span></text:p>
      <text:p text:style-name="Preformatted_20_Text"><text:span text:style-name="Source_20_Text">message queues</text:span></text:p>
      <text:p text:style-name="Preformatted_20_Text"><text:span text:style-name="Source_20_Text">batch vs streaming</text:span></text:p>
      <text:p text:style-name="Preformatted_20_Text"><text:span text:style-name="Source_20_Text">backpressure</text:span></text:p>
      <text:p text:style-name="P1"><text:soft-page-break/><text:span text:style-name="Source_20_Text">event ordering</text:span></text:p>
      <text:p text:style-name="Text_20_body">Technologies to understand:</text:p>
      <text:p text:style-name="Preformatted_20_Text"><text:span text:style-name="Source_20_Text">Kafka</text:span></text:p>
      <text:p text:style-name="Preformatted_20_Text"><text:span text:style-name="Source_20_Text">Redis streams</text:span></text:p>
      <text:p text:style-name="P1"><text:span text:style-name="Source_20_Text">RabbitMQ</text:span></text:p>
      <text:p text:style-name="Horizontal_20_Line"/>
      <text:h text:style-name="Heading_20_1" text:outline-level="1">Experiments To Run</text:h>
      <text:h text:style-name="Heading_20_3" text:outline-level="3">Experiment 8 — Queue-Based Ingestion</text:h>
      <text:p text:style-name="Text_20_body">Modify architecture:</text:p>
      <text:p text:style-name="P1"><text:span text:style-name="Source_20_Text">Generator → Queue → API Worker → PostgreSQL</text:span></text:p>
      <text:p text:style-name="Text_20_body">Use:</text:p>
      <text:p text:style-name="P1"><text:span text:style-name="Source_20_Text">Redis</text:span></text:p>
      <text:p text:style-name="Text_20_body">Measure:</text:p>
      <text:p text:style-name="Preformatted_20_Text"><text:span text:style-name="Source_20_Text">throughput</text:span></text:p>
      <text:p text:style-name="Preformatted_20_Text"><text:span text:style-name="Source_20_Text">queue depth</text:span></text:p>
      <text:p text:style-name="P1"><text:span text:style-name="Source_20_Text">processing latency</text:span></text:p>
      <text:p text:style-name="Horizontal_20_Line"/>
      <text:h text:style-name="Heading_20_3" text:outline-level="3">Experiment 9 — Write Throughput</text:h>
      <text:p text:style-name="Text_20_body">Measure:</text:p>
      <text:p text:style-name="P1"><text:span text:style-name="Source_20_Text">events per second PostgreSQL can ingest</text:span></text:p>
      <text:p text:style-name="Text_20_body">Test:</text:p>
      <text:p text:style-name="Preformatted_20_Text"><text:span text:style-name="Source_20_Text">single inserts</text:span></text:p>
      <text:p text:style-name="Preformatted_20_Text"><text:span text:style-name="Source_20_Text">batch inserts</text:span></text:p>
      <text:p text:style-name="P1"><text:span text:style-name="Source_20_Text">COPY command</text:span></text:p>
      <text:p text:style-name="Horizontal_20_Line"/>
      <text:h text:style-name="Heading_20_1" text:outline-level="1">Questions To Answer</text:h>
      <text:list text:style-name="L6">
        <text:list-item>
          <text:p text:style-name="P7">Why do large systems use <text:span text:style-name="Strong_20_Emphasis">queues for ingestion</text:span>?</text:p>
        </text:list-item>
        <text:list-item>
          <text:p text:style-name="P7">Why are <text:span text:style-name="Strong_20_Emphasis">batch inserts faster</text:span>?</text:p>
        </text:list-item>
        <text:list-item>
          <text:p text:style-name="P7">What is <text:span text:style-name="Strong_20_Emphasis">backpressure</text:span>?</text:p>
        </text:list-item>
        <text:list-item>
          <text:p text:style-name="P7"><text:soft-page-break/>What happens if ingestion rate exceeds database capacity?</text:p>
        </text:list-item>
      </text:list>
      <text:p text:style-name="Horizontal_20_Line"/>
      <text:h text:style-name="Heading_20_1" text:outline-level="1">Phase 5 — Performance Engineering</text:h>
      <text:p text:style-name="Text_20_body">This phase separates <text:span text:style-name="Strong_20_Emphasis">average engineers from strong ones.</text:span></text:p>
      <text:p text:style-name="Horizontal_20_Line"/>
      <text:h text:style-name="Heading_20_1" text:outline-level="1">What To Study</text:h>
      <text:p text:style-name="Preformatted_20_Text"><text:span text:style-name="Source_20_Text">system profiling</text:span></text:p>
      <text:p text:style-name="Preformatted_20_Text"><text:span text:style-name="Source_20_Text">CPU vs IO bottlenecks</text:span></text:p>
      <text:p text:style-name="Preformatted_20_Text"><text:span text:style-name="Source_20_Text">database throughput limits</text:span></text:p>
      <text:p text:style-name="P1"><text:span text:style-name="Source_20_Text">memory usage</text:span></text:p>
      <text:p text:style-name="Text_20_body">Linux tools:</text:p>
      <text:p text:style-name="Preformatted_20_Text"><text:span text:style-name="Source_20_Text">htop</text:span></text:p>
      <text:p text:style-name="Preformatted_20_Text"><text:span text:style-name="Source_20_Text">iotop</text:span></text:p>
      <text:p text:style-name="Preformatted_20_Text"><text:span text:style-name="Source_20_Text">vmstat</text:span></text:p>
      <text:p text:style-name="P1"><text:span text:style-name="Source_20_Text">perf</text:span></text:p>
      <text:p text:style-name="Horizontal_20_Line"/>
      <text:h text:style-name="Heading_20_1" text:outline-level="1">Experiments To Run</text:h>
      <text:h text:style-name="Heading_20_3" text:outline-level="3">Experiment 10 — Database Bottleneck Analysis</text:h>
      <text:p text:style-name="Text_20_body">Load system heavily.</text:p>
      <text:p text:style-name="Text_20_body">Measure:</text:p>
      <text:p text:style-name="Preformatted_20_Text"><text:span text:style-name="Source_20_Text">CPU</text:span></text:p>
      <text:p text:style-name="Preformatted_20_Text"><text:span text:style-name="Source_20_Text">disk IO</text:span></text:p>
      <text:p text:style-name="Preformatted_20_Text"><text:span text:style-name="Source_20_Text">memory</text:span></text:p>
      <text:p text:style-name="P1"><text:span text:style-name="Source_20_Text">query latency</text:span></text:p>
      <text:p text:style-name="Text_20_body">Identify:</text:p>
      <text:p text:style-name="P1"><text:span text:style-name="Source_20_Text">where the bottleneck occurs</text:span></text:p>
      <text:p text:style-name="Horizontal_20_Line"/>
      <text:h text:style-name="Heading_20_3" text:outline-level="3">Experiment 11 — API Horizontal Scaling</text:h>
      <text:p text:style-name="Text_20_body">Run:</text:p>
      <text:p text:style-name="P1"><text:span text:style-name="Source_20_Text">multiple FastAPI workers</text:span></text:p>
      <text:p text:style-name="Text_20_body"><text:soft-page-break/>Use:</text:p>
      <text:p text:style-name="Preformatted_20_Text"><text:span text:style-name="Source_20_Text">gunicorn</text:span></text:p>
      <text:p text:style-name="P1"><text:span text:style-name="Source_20_Text">uvicorn workers</text:span></text:p>
      <text:p text:style-name="Text_20_body">Measure throughput scaling.</text:p>
      <text:p text:style-name="Horizontal_20_Line"/>
      <text:h text:style-name="Heading_20_1" text:outline-level="1">Questions To Answer</text:h>
      <text:list text:style-name="L7">
        <text:list-item>
          <text:p text:style-name="P8">How do you detect <text:span text:style-name="Strong_20_Emphasis">CPU vs IO bottlenecks</text:span>?</text:p>
        </text:list-item>
        <text:list-item>
          <text:p text:style-name="P8">What limits <text:span text:style-name="Strong_20_Emphasis">PostgreSQL write throughput</text:span>?</text:p>
        </text:list-item>
        <text:list-item>
          <text:p text:style-name="P8">Why do some queries degrade dramatically with large datasets?</text:p>
        </text:list-item>
      </text:list>
      <text:p text:style-name="Horizontal_20_Line"/>
      <text:h text:style-name="Heading_20_1" text:outline-level="1">Phase 6 — Production Engineering</text:h>
      <text:p text:style-name="Text_20_body">Now turn your project into something <text:span text:style-name="Strong_20_Emphasis">deployable like a real service.</text:span></text:p>
      <text:p text:style-name="Horizontal_20_Line"/>
      <text:h text:style-name="Heading_20_1" text:outline-level="1">What To Study</text:h>
      <text:p text:style-name="Preformatted_20_Text"><text:span text:style-name="Source_20_Text">Docker</text:span></text:p>
      <text:p text:style-name="Preformatted_20_Text"><text:span text:style-name="Source_20_Text">CI/CD pipelines</text:span></text:p>
      <text:p text:style-name="Preformatted_20_Text"><text:span text:style-name="Source_20_Text">monitoring</text:span></text:p>
      <text:p text:style-name="P1"><text:span text:style-name="Source_20_Text">observability</text:span></text:p>
      <text:p text:style-name="Text_20_body">Important tools:</text:p>
      <text:p text:style-name="Preformatted_20_Text"><text:span text:style-name="Source_20_Text">Docker</text:span></text:p>
      <text:p text:style-name="Preformatted_20_Text"><text:span text:style-name="Source_20_Text">Prometheus</text:span></text:p>
      <text:p text:style-name="Preformatted_20_Text"><text:span text:style-name="Source_20_Text">Grafana</text:span></text:p>
      <text:p text:style-name="P1"><text:span text:style-name="Source_20_Text">GitHub Actions</text:span></text:p>
      <text:p text:style-name="Horizontal_20_Line"/>
      <text:h text:style-name="Heading_20_1" text:outline-level="1">Experiments To Run</text:h>
      <text:h text:style-name="Heading_20_3" text:outline-level="3">Experiment 12 — Containerization</text:h>
      <text:p text:style-name="Text_20_body">Containerize:</text:p>
      <text:p text:style-name="Preformatted_20_Text"><text:span text:style-name="Source_20_Text">FastAPI</text:span></text:p>
      <text:p text:style-name="Preformatted_20_Text"><text:span text:style-name="Source_20_Text">PostgreSQL</text:span></text:p>
      <text:p text:style-name="P1"><text:span text:style-name="Source_20_Text">event generator</text:span></text:p>
      <text:p text:style-name="Text_20_body"><text:soft-page-break/>Deploy with:</text:p>
      <text:p text:style-name="P1"><text:span text:style-name="Source_20_Text">docker compose</text:span></text:p>
      <text:p text:style-name="Horizontal_20_Line"/>
      <text:h text:style-name="Heading_20_3" text:outline-level="3">Experiment 13 — Observability</text:h>
      <text:p text:style-name="Text_20_body">Add metrics:</text:p>
      <text:p text:style-name="Preformatted_20_Text"><text:span text:style-name="Source_20_Text">API latency</text:span></text:p>
      <text:p text:style-name="Preformatted_20_Text"><text:span text:style-name="Source_20_Text">event ingestion rate</text:span></text:p>
      <text:p text:style-name="P1"><text:span text:style-name="Source_20_Text">DB query time</text:span></text:p>
      <text:p text:style-name="Text_20_body">Use:</text:p>
      <text:p text:style-name="P1"><text:span text:style-name="Source_20_Text">Prometheus + Grafana</text:span></text:p>
      <text:p text:style-name="Horizontal_20_Line"/>
      <text:h text:style-name="Heading_20_1" text:outline-level="1">Questions To Answer</text:h>
      <text:list text:style-name="L8">
        <text:list-item>
          <text:p text:style-name="P9">What metrics reveal <text:span text:style-name="Strong_20_Emphasis">system health</text:span>?</text:p>
        </text:list-item>
        <text:list-item>
          <text:p text:style-name="P9">What causes <text:span text:style-name="Strong_20_Emphasis">production outages</text:span> in data systems?</text:p>
        </text:list-item>
        <text:list-item>
          <text:p text:style-name="P9">How do you debug slow systems?</text:p>
        </text:list-item>
      </text:list>
      <text:p text:style-name="Horizontal_20_Line"/>
      <text:h text:style-name="Heading_20_1" text:outline-level="1">Final Mastery Challenge</text:h>
      <text:p text:style-name="Text_20_body">Turn your project into a <text:span text:style-name="Strong_20_Emphasis">mini analytics platform.</text:span></text:p>
      <text:p text:style-name="Text_20_body">Architecture:</text:p>
      <text:p text:style-name="Preformatted_20_Text"><text:span text:style-name="Source_20_Text">Event Generator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reformatted_20_Text"><text:span text:style-name="Source_20_Text">API Ingestion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reformatted_20_Text"><text:span text:style-name="Source_20_Text">Queue (Redis/Kafka)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reformatted_20_Text"><text:span text:style-name="Source_20_Text">Worker Service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reformatted_20_Text"><text:span text:style-name="Source_20_Text">Partitioned PostgreSQL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reformatted_20_Text"><text:span text:style-name="Source_20_Text">Analytics API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1"><text:soft-page-break/><text:span text:style-name="Source_20_Text">Grafana Dashboard</text:span></text:p>
      <text:p text:style-name="Text_20_body">If you can build and understand this end-to-end system, you will understand the <text:span text:style-name="Strong_20_Emphasis">core architecture behind many real data platforms.</text:span></text:p>
      <text:p text:style-name="Horizontal_20_Line"/>
      <text:h text:style-name="Heading_20_1" text:outline-level="1">The Real Skill You Are Building</text:h>
      <text:p text:style-name="Text_20_body">You are training the ability to answer questions like:</text:p>
      <text:p text:style-name="Preformatted_20_Text"><text:span text:style-name="Source_20_Text">Why is this system slow?</text:span></text:p>
      <text:p text:style-name="Preformatted_20_Text"><text:span text:style-name="Source_20_Text">Where is the bottleneck?</text:span></text:p>
      <text:p text:style-name="P1"><text:span text:style-name="Source_20_Text">What design decision caused this?</text:span></text:p>
      <text:p text:style-name="Text_20_body">That mindset is <text:span text:style-name="Strong_20_Emphasis">systems engineering</text:span>, not just coding.</text:p>
      <text:p text:style-name="Horizontal_20_Line"/>
      <text:p text:style-name="Text_20_body"/>
      <text:p text:style-name="Text_20_body"/>
      <text:p text:style-name="Text_20_body"/>
      <text:h text:style-name="P10" text:outline-level="1">Advanced Engineering Mastery Roadmap</text:h>
      <text:h text:style-name="P11" text:outline-level="3">Based on Your Event Analytics System</text:h>
      <text:p text:style-name="Text_20_body">Your current system:</text:p>
      <text:p text:style-name="P12"><text:span text:style-name="Source_20_Text">Event Generator</text:span></text:p>
      <text:p text:style-name="P12"><text:span text:style-name="Source_20_Text"><text:s text:c="6"/>│</text:span></text:p>
      <text:p text:style-name="P12"><text:span text:style-name="Source_20_Text"><text:s text:c="6"/>▼</text:span></text:p>
      <text:p text:style-name="P12"><text:span text:style-name="Source_20_Text">FastAPI API</text:span></text:p>
      <text:p text:style-name="P12"><text:span text:style-name="Source_20_Text"><text:s text:c="6"/>│</text:span></text:p>
      <text:p text:style-name="P12"><text:span text:style-name="Source_20_Text"><text:s text:c="6"/>▼</text:span></text:p>
      <text:p text:style-name="P12"><text:span text:style-name="Source_20_Text">PostgreSQL</text:span></text:p>
      <text:p text:style-name="P12"><text:span text:style-name="Source_20_Text"><text:s text:c="6"/>│</text:span></text:p>
      <text:p text:style-name="P12"><text:span text:style-name="Source_20_Text"><text:s text:c="6"/>▼</text:span></text:p>
      <text:p text:style-name="P12"><text:span text:style-name="Source_20_Text">Analytics Queries</text:span></text:p>
      <text:p text:style-name="Text_20_body">The upgraded system you will build:</text:p>
      <text:p text:style-name="P12"><text:span text:style-name="Source_20_Text">Event Generator</text:span></text:p>
      <text:p text:style-name="P12"><text:span text:style-name="Source_20_Text"><text:s text:c="6"/>│</text:span></text:p>
      <text:p text:style-name="P12"><text:span text:style-name="Source_20_Text"><text:s text:c="6"/>▼</text:span></text:p>
      <text:p text:style-name="P12"><text:span text:style-name="Source_20_Text">Ingestion API</text:span></text:p>
      <text:p text:style-name="P12"><text:span text:style-name="Source_20_Text"><text:s text:c="6"/>│</text:span></text:p>
      <text:p text:style-name="P12"><text:span text:style-name="Source_20_Text"><text:s text:c="6"/>▼</text:span></text:p>
      <text:p text:style-name="P12"><text:span text:style-name="Source_20_Text">Queue (Kafka / Redis Streams)</text:span></text:p>
      <text:p text:style-name="P12"><text:span text:style-name="Source_20_Text"><text:s text:c="6"/>│</text:span></text:p>
      <text:p text:style-name="P12"><text:span text:style-name="Source_20_Text"><text:s text:c="6"/>▼</text:span></text:p>
      <text:p text:style-name="P12"><text:span text:style-name="Source_20_Text">Processing Workers</text:span></text:p>
      <text:p text:style-name="P12"><text:span text:style-name="Source_20_Text"><text:s text:c="6"/>│</text:span></text:p>
      <text:p text:style-name="P12"><text:span text:style-name="Source_20_Text"><text:s text:c="6"/>▼</text:span></text:p>
      <text:p text:style-name="P12"><text:span text:style-name="Source_20_Text">Partitioned Storage</text:span></text:p>
      <text:p text:style-name="P12"><text:span text:style-name="Source_20_Text">(PostgreSQL / ClickHouse)</text:span></text:p>
      <text:p text:style-name="P12"><text:span text:style-name="Source_20_Text"><text:s text:c="6"/>│</text:span></text:p>
      <text:p text:style-name="P12"><text:span text:style-name="Source_20_Text"><text:s text:c="6"/>▼</text:span></text:p>
      <text:p text:style-name="P12"><text:span text:style-name="Source_20_Text">Analytics API</text:span></text:p>
      <text:p text:style-name="P12"><text:span text:style-name="Source_20_Text"><text:s text:c="6"/>│</text:span></text:p>
      <text:p text:style-name="P12"><text:soft-page-break/><text:span text:style-name="Source_20_Text"><text:s text:c="6"/>▼</text:span></text:p>
      <text:p text:style-name="P12"><text:span text:style-name="Source_20_Text">Dashboards</text:span></text:p>
      <text:p text:style-name="Text_20_body">This architecture is similar to what powers:</text:p>
      <text:list text:style-name="L9">
        <text:list-item>
          <text:p text:style-name="P13"><text:span text:style-name="Strong_20_Emphasis">Segment</text:span></text:p>
        </text:list-item>
        <text:list-item>
          <text:p text:style-name="P13"><text:span text:style-name="Strong_20_Emphasis">Snowplow</text:span></text:p>
        </text:list-item>
        <text:list-item>
          <text:p text:style-name="P13"><text:span text:style-name="Strong_20_Emphasis">Datadog</text:span></text:p>
        </text:list-item>
        <text:list-item>
          <text:p text:style-name="P13"><text:span text:style-name="Strong_20_Emphasis">Amplitude</text:span></text:p>
        </text:list-item>
      </text:list>
      <text:p text:style-name="P14"/>
      <text:h text:style-name="P15" text:outline-level="1">Phase 1 — High-Throughput Event Ingestion</text:h>
      <text:p text:style-name="Text_20_body">Right now events go <text:span text:style-name="Strong_20_Emphasis">directly to the database.</text:span></text:p>
      <text:p text:style-name="Text_20_body">That works for small systems but fails quickly under load.</text:p>
      <text:p text:style-name="P14"/>
      <text:h text:style-name="P15" text:outline-level="1">What To Study</text:h>
      <text:p text:style-name="Text_20_body">Core ingestion concepts:</text:p>
      <text:p text:style-name="P12"><text:span text:style-name="Source_20_Text">write amplification</text:span></text:p>
      <text:p text:style-name="P12"><text:span text:style-name="Source_20_Text">backpressure</text:span></text:p>
      <text:p text:style-name="P12"><text:span text:style-name="Source_20_Text">burst traffic</text:span></text:p>
      <text:p text:style-name="P12"><text:span text:style-name="Source_20_Text">durable messaging</text:span></text:p>
      <text:p text:style-name="P12"><text:span text:style-name="Source_20_Text">event durability</text:span></text:p>
      <text:p text:style-name="Text_20_body">Technologies:</text:p>
      <text:p text:style-name="P12"><text:span text:style-name="Source_20_Text">Kafka</text:span></text:p>
      <text:p text:style-name="P12"><text:span text:style-name="Source_20_Text">Redis Streams</text:span></text:p>
      <text:p text:style-name="P12"><text:span text:style-name="Source_20_Text">log-based queues</text:span></text:p>
      <text:p text:style-name="Text_20_body">Why queues exist:</text:p>
      <text:p text:style-name="Text_20_body">Real systems decouple:</text:p>
      <text:p text:style-name="P12"><text:span text:style-name="Source_20_Text">event ingestion</text:span></text:p>
      <text:p text:style-name="P12"><text:span text:style-name="Source_20_Text">event processing</text:span></text:p>
      <text:p text:style-name="P12"><text:span text:style-name="Source_20_Text">event storage</text:span></text:p>
      <text:p text:style-name="P14"/>
      <text:h text:style-name="P15" text:outline-level="1"><text:soft-page-break/>Experiments To Run</text:h>
      <text:h text:style-name="P11" text:outline-level="3">Experiment 1 — Throughput Benchmark</text:h>
      <text:p text:style-name="Text_20_body">Measure current system capacity.</text:p>
      <text:p text:style-name="Text_20_body">Write a load generator:</text:p>
      <text:p text:style-name="P12"><text:span text:style-name="Source_20_Text">100 events/sec</text:span></text:p>
      <text:p text:style-name="P12"><text:span text:style-name="Source_20_Text">500 events/sec</text:span></text:p>
      <text:p text:style-name="P12"><text:span text:style-name="Source_20_Text">1000 events/sec</text:span></text:p>
      <text:p text:style-name="Text_20_body">Measure:</text:p>
      <text:p text:style-name="P12"><text:span text:style-name="Source_20_Text">API latency</text:span></text:p>
      <text:p text:style-name="P12"><text:span text:style-name="Source_20_Text">database CPU</text:span></text:p>
      <text:p text:style-name="P12"><text:span text:style-name="Source_20_Text">error rate</text:span></text:p>
      <text:p text:style-name="Text_20_body">Goal:</text:p>
      <text:p text:style-name="Text_20_body">Find <text:span text:style-name="Strong_20_Emphasis">maximum sustainable ingestion rate.</text:span></text:p>
      <text:p text:style-name="P14"/>
      <text:h text:style-name="P11" text:outline-level="3">Experiment 2 — Batch Inserts</text:h>
      <text:p text:style-name="Text_20_body">Modify ingestion to insert events in batches.</text:p>
      <text:p text:style-name="Text_20_body">Instead of:</text:p>
      <text:p text:style-name="P12"><text:span text:style-name="Source_20_Text">INSERT per request</text:span></text:p>
      <text:p text:style-name="Text_20_body">Use:</text:p>
      <text:p text:style-name="P12"><text:span text:style-name="Source_20_Text">batch insert of 100 events</text:span></text:p>
      <text:p text:style-name="Text_20_body">Measure:</text:p>
      <text:p text:style-name="P12"><text:span text:style-name="Source_20_Text">events/sec improvement</text:span></text:p>
      <text:p text:style-name="Text_20_body">You should see <text:span text:style-name="Strong_20_Emphasis">10–50x throughput improvement.</text:span></text:p>
      <text:p text:style-name="P14"/>
      <text:h text:style-name="P15" text:outline-level="1">Questions To Answer</text:h>
      <text:list text:style-name="L10">
        <text:list-item>
          <text:p text:style-name="P16">Why are <text:span text:style-name="Strong_20_Emphasis">batch inserts dramatically faster</text:span> than single inserts?</text:p>
        </text:list-item>
        <text:list-item>
          <text:p text:style-name="P16">What limits PostgreSQL write throughput?</text:p>
        </text:list-item>
        <text:list-item>
          <text:p text:style-name="P16">What happens when ingestion exceeds database capacity?</text:p>
        </text:list-item>
      </text:list>
      <text:p text:style-name="P14"/>
      <text:h text:style-name="P15" text:outline-level="1"><text:soft-page-break/>Phase 2 — Queue-Based Architecture</text:h>
      <text:p text:style-name="Text_20_body">Introduce a <text:span text:style-name="Strong_20_Emphasis">buffer between API and database.</text:span></text:p>
      <text:p text:style-name="P14"/>
      <text:p text:style-name="Text_20_body">New architecture:</text:p>
      <text:p text:style-name="P12"><text:span text:style-name="Source_20_Text">Event Generator</text:span></text:p>
      <text:p text:style-name="P12"><text:span text:style-name="Source_20_Text"><text:s text:c="6"/>│</text:span></text:p>
      <text:p text:style-name="P12"><text:span text:style-name="Source_20_Text"><text:s text:c="6"/>▼</text:span></text:p>
      <text:p text:style-name="P12"><text:span text:style-name="Source_20_Text">API</text:span></text:p>
      <text:p text:style-name="P12"><text:span text:style-name="Source_20_Text"><text:s text:c="6"/>│</text:span></text:p>
      <text:p text:style-name="P12"><text:span text:style-name="Source_20_Text"><text:s text:c="6"/>▼</text:span></text:p>
      <text:p text:style-name="P12"><text:span text:style-name="Source_20_Text">Queue</text:span></text:p>
      <text:p text:style-name="P12"><text:span text:style-name="Source_20_Text"><text:s text:c="6"/>│</text:span></text:p>
      <text:p text:style-name="P12"><text:span text:style-name="Source_20_Text"><text:s text:c="6"/>▼</text:span></text:p>
      <text:p text:style-name="P12"><text:span text:style-name="Source_20_Text">Worker</text:span></text:p>
      <text:p text:style-name="P12"><text:span text:style-name="Source_20_Text"><text:s text:c="6"/>│</text:span></text:p>
      <text:p text:style-name="P12"><text:span text:style-name="Source_20_Text"><text:s text:c="6"/>▼</text:span></text:p>
      <text:p text:style-name="P12"><text:span text:style-name="Source_20_Text">PostgreSQL</text:span></text:p>
      <text:p text:style-name="P14"/>
      <text:h text:style-name="P15" text:outline-level="1">What To Study</text:h>
      <text:p text:style-name="P12"><text:span text:style-name="Source_20_Text">message durability</text:span></text:p>
      <text:p text:style-name="P12"><text:span text:style-name="Source_20_Text">consumer groups</text:span></text:p>
      <text:p text:style-name="P12"><text:span text:style-name="Source_20_Text">event replay</text:span></text:p>
      <text:p text:style-name="P12"><text:span text:style-name="Source_20_Text">partitioned logs</text:span></text:p>
      <text:p text:style-name="Text_20_body">Technologies to explore:</text:p>
      <text:p text:style-name="P12"><text:span text:style-name="Source_20_Text">Redis Streams (easy)</text:span></text:p>
      <text:p text:style-name="P12"><text:span text:style-name="Source_20_Text">Kafka (industry standard)</text:span></text:p>
      <text:p text:style-name="P14"/>
      <text:h text:style-name="P15" text:outline-level="1">Experiments To Run</text:h>
      <text:h text:style-name="P11" text:outline-level="3">Experiment 3 — Redis Streams Queue</text:h>
      <text:p text:style-name="Text_20_body">Modify ingestion:</text:p>
      <text:p text:style-name="P12"><text:span text:style-name="Source_20_Text">POST /events</text:span></text:p>
      <text:p text:style-name="P12"><text:soft-page-break/><text:span text:style-name="Source_20_Text"><text:s text:c="3"/>↓</text:span></text:p>
      <text:p text:style-name="P12"><text:span text:style-name="Source_20_Text">write to Redis stream</text:span></text:p>
      <text:p text:style-name="Text_20_body">Worker service:</text:p>
      <text:p text:style-name="P12"><text:span text:style-name="Source_20_Text">read from stream</text:span></text:p>
      <text:p text:style-name="P12"><text:span text:style-name="Source_20_Text">insert into PostgreSQL</text:span></text:p>
      <text:p text:style-name="Text_20_body">Measure:</text:p>
      <text:p text:style-name="P12"><text:span text:style-name="Source_20_Text">ingestion latency</text:span></text:p>
      <text:p text:style-name="P12"><text:span text:style-name="Source_20_Text">queue backlog</text:span></text:p>
      <text:p text:style-name="P12"><text:span text:style-name="Source_20_Text">worker throughput</text:span></text:p>
      <text:p text:style-name="P14"/>
      <text:h text:style-name="P11" text:outline-level="3">Experiment 4 — Failure Simulation</text:h>
      <text:p text:style-name="Text_20_body">Kill worker process.</text:p>
      <text:p text:style-name="Text_20_body">Observe:</text:p>
      <text:p text:style-name="P12"><text:span text:style-name="Source_20_Text">queue backlog grows</text:span></text:p>
      <text:p text:style-name="P12"><text:span text:style-name="Source_20_Text">events remain durable</text:span></text:p>
      <text:p text:style-name="Text_20_body">Restart worker.</text:p>
      <text:p text:style-name="Text_20_body">Observe recovery.</text:p>
      <text:p text:style-name="Text_20_body">This teaches <text:span text:style-name="Strong_20_Emphasis">durable ingestion design.</text:span></text:p>
      <text:p text:style-name="P14"/>
      <text:h text:style-name="P15" text:outline-level="1">Questions To Answer</text:h>
      <text:list text:style-name="L11">
        <text:list-item>
          <text:p text:style-name="P17">Why do event systems use <text:span text:style-name="Strong_20_Emphasis">log-based queues</text:span>?</text:p>
        </text:list-item>
        <text:list-item>
          <text:p text:style-name="P17">What happens if workers crash?</text:p>
        </text:list-item>
        <text:list-item>
          <text:p text:style-name="P17">How do consumer groups scale processing?</text:p>
        </text:list-item>
      </text:list>
      <text:p text:style-name="P14"/>
      <text:h text:style-name="P15" text:outline-level="1">Phase 3 — Time-Series Data Architecture</text:h>
      <text:p text:style-name="Text_20_body">Your event system is fundamentally a <text:span text:style-name="Strong_20_Emphasis">time-series database problem.</text:span></text:p>
      <text:p text:style-name="P14"/>
      <text:h text:style-name="P15" text:outline-level="1">What To Study</text:h>
      <text:p text:style-name="P12"><text:span text:style-name="Source_20_Text">time-series storage</text:span></text:p>
      <text:p text:style-name="P12"><text:span text:style-name="Source_20_Text">append-only data</text:span></text:p>
      <text:p text:style-name="P12"><text:soft-page-break/><text:span text:style-name="Source_20_Text">cold vs hot partitions</text:span></text:p>
      <text:p text:style-name="P12"><text:span text:style-name="Source_20_Text">retention policies</text:span></text:p>
      <text:p text:style-name="Text_20_body">Technologies used in industry:</text:p>
      <text:p text:style-name="P12"><text:span text:style-name="Source_20_Text">ClickHouse</text:span></text:p>
      <text:p text:style-name="P12"><text:span text:style-name="Source_20_Text">TimescaleDB</text:span></text:p>
      <text:p text:style-name="P12"><text:span text:style-name="Source_20_Text">BigQuery</text:span></text:p>
      <text:p text:style-name="P12"><text:span text:style-name="Source_20_Text">Snowflake</text:span></text:p>
      <text:p text:style-name="P14"/>
      <text:h text:style-name="P15" text:outline-level="1">Experiments To Run</text:h>
      <text:h text:style-name="P11" text:outline-level="3">Experiment 5 — Partitioned Tables</text:h>
      <text:p text:style-name="Text_20_body">Partition by time:</text:p>
      <text:p text:style-name="P12"><text:span text:style-name="Source_20_Text">events_2026_03</text:span></text:p>
      <text:p text:style-name="P12"><text:span text:style-name="Source_20_Text">events_2026_04</text:span></text:p>
      <text:p text:style-name="Text_20_body">Use:</text:p>
      <text:p text:style-name="P12"><text:span text:style-name="Source_20_Text">PARTITION BY RANGE (occurred_at)</text:span></text:p>
      <text:p text:style-name="Text_20_body">Measure:</text:p>
      <text:p text:style-name="P12"><text:span text:style-name="Source_20_Text">query latency</text:span></text:p>
      <text:p text:style-name="P12"><text:span text:style-name="Source_20_Text">index size</text:span></text:p>
      <text:p text:style-name="P14"/>
      <text:h text:style-name="P11" text:outline-level="3">Experiment 6 — Large Dataset Stress Test</text:h>
      <text:p text:style-name="Text_20_body">Generate:</text:p>
      <text:p text:style-name="P12"><text:span text:style-name="Source_20_Text">5 million events</text:span></text:p>
      <text:p text:style-name="P12"><text:span text:style-name="Source_20_Text">20 million events</text:span></text:p>
      <text:p text:style-name="P12"><text:span text:style-name="Source_20_Text">50 million events</text:span></text:p>
      <text:p text:style-name="Text_20_body">Run queries:</text:p>
      <text:p text:style-name="P12"><text:span text:style-name="Source_20_Text">events per hour</text:span></text:p>
      <text:p text:style-name="P12"><text:span text:style-name="Source_20_Text">events by type</text:span></text:p>
      <text:p text:style-name="Text_20_body">Observe:</text:p>
      <text:p text:style-name="P12"><text:span text:style-name="Source_20_Text">query plan changes</text:span></text:p>
      <text:p text:style-name="P14"/>
      <text:h text:style-name="P15" text:outline-level="1"><text:soft-page-break/>Questions To Answer</text:h>
      <text:list text:style-name="L12">
        <text:list-item>
          <text:p text:style-name="P18">Why do analytics systems partition by time?</text:p>
        </text:list-item>
        <text:list-item>
          <text:p text:style-name="P18">Why do large tables slow down queries?</text:p>
        </text:list-item>
        <text:list-item>
          <text:p text:style-name="P18">What is <text:span text:style-name="Strong_20_Emphasis">partition pruning</text:span>?</text:p>
        </text:list-item>
      </text:list>
      <text:p text:style-name="P14"/>
      <text:h text:style-name="P15" text:outline-level="1">Phase 4 — Columnar Analytics Databases</text:h>
      <text:p text:style-name="Text_20_body">PostgreSQL is not ideal for heavy analytics.</text:p>
      <text:p text:style-name="Text_20_body">Real event analytics often use <text:span text:style-name="Strong_20_Emphasis">columnar databases.</text:span></text:p>
      <text:p text:style-name="P14"/>
      <text:h text:style-name="P15" text:outline-level="1">What To Study</text:h>
      <text:p text:style-name="P12"><text:span text:style-name="Source_20_Text">row storage vs column storage</text:span></text:p>
      <text:p text:style-name="P12"><text:span text:style-name="Source_20_Text">vectorized execution</text:span></text:p>
      <text:p text:style-name="P12"><text:span text:style-name="Source_20_Text">column compression</text:span></text:p>
      <text:p text:style-name="Text_20_body">Key database:</text:p>
      <text:p text:style-name="P12"><text:span text:style-name="Source_20_Text">ClickHouse</text:span></text:p>
      <text:p text:style-name="Text_20_body">Used by:</text:p>
      <text:list text:style-name="L13">
        <text:list-item>
          <text:p text:style-name="P19">Cloudflare</text:p>
        </text:list-item>
        <text:list-item>
          <text:p text:style-name="P19">Uber</text:p>
        </text:list-item>
        <text:list-item>
          <text:p text:style-name="P19">Datadog</text:p>
        </text:list-item>
        <text:list-item>
          <text:p text:style-name="P19">Plausible analytics</text:p>
        </text:list-item>
      </text:list>
      <text:p text:style-name="P14"/>
      <text:h text:style-name="P15" text:outline-level="1">Experiments To Run</text:h>
      <text:h text:style-name="P11" text:outline-level="3">Experiment 7 — ClickHouse Analytics</text:h>
      <text:p text:style-name="Text_20_body">Install ClickHouse.</text:p>
      <text:p text:style-name="Text_20_body">Store events there.</text:p>
      <text:p text:style-name="Text_20_body">Run analytics queries:</text:p>
      <text:p text:style-name="P12"><text:span text:style-name="Source_20_Text">events per hour</text:span></text:p>
      <text:p text:style-name="P12"><text:span text:style-name="Source_20_Text">events by page</text:span></text:p>
      <text:p text:style-name="P12"><text:span text:style-name="Source_20_Text">top pages</text:span></text:p>
      <text:p text:style-name="Text_20_body"><text:soft-page-break/>Compare performance:</text:p>
      <text:p text:style-name="P12"><text:span text:style-name="Source_20_Text">PostgreSQL vs ClickHouse</text:span></text:p>
      <text:p text:style-name="Text_20_body">You will often see:</text:p>
      <text:p text:style-name="P12"><text:span text:style-name="Source_20_Text">10x–100x faster analytics</text:span></text:p>
      <text:p text:style-name="P14"/>
      <text:h text:style-name="P15" text:outline-level="1">Questions To Answer</text:h>
      <text:list text:style-name="L14">
        <text:list-item>
          <text:p text:style-name="P20">Why are column databases faster for analytics?</text:p>
        </text:list-item>
        <text:list-item>
          <text:p text:style-name="P20">Why do OLTP databases struggle with analytical queries?</text:p>
        </text:list-item>
      </text:list>
      <text:p text:style-name="P14"/>
      <text:h text:style-name="P15" text:outline-level="1">Phase 5 — Observability Engineering</text:h>
      <text:p text:style-name="Text_20_body">Production systems must be observable.</text:p>
      <text:p text:style-name="P14"/>
      <text:h text:style-name="P15" text:outline-level="1">What To Study</text:h>
      <text:p text:style-name="P12"><text:span text:style-name="Source_20_Text">metrics</text:span></text:p>
      <text:p text:style-name="P12"><text:span text:style-name="Source_20_Text">distributed tracing</text:span></text:p>
      <text:p text:style-name="P12"><text:span text:style-name="Source_20_Text">structured logging</text:span></text:p>
      <text:p text:style-name="Text_20_body">Tools:</text:p>
      <text:p text:style-name="P12"><text:span text:style-name="Source_20_Text">Prometheus</text:span></text:p>
      <text:p text:style-name="P12"><text:span text:style-name="Source_20_Text">Grafana</text:span></text:p>
      <text:p text:style-name="P12"><text:span text:style-name="Source_20_Text">OpenTelemetry</text:span></text:p>
      <text:p text:style-name="P14"/>
      <text:h text:style-name="P15" text:outline-level="1">Experiments To Run</text:h>
      <text:h text:style-name="P11" text:outline-level="3">Experiment 8 — Metrics Collection</text:h>
      <text:p text:style-name="Text_20_body">Track:</text:p>
      <text:p text:style-name="P12"><text:span text:style-name="Source_20_Text">API request latency</text:span></text:p>
      <text:p text:style-name="P12"><text:span text:style-name="Source_20_Text">event ingestion rate</text:span></text:p>
      <text:p text:style-name="P12"><text:span text:style-name="Source_20_Text">database query time</text:span></text:p>
      <text:p text:style-name="P12"><text:span text:style-name="Source_20_Text">queue depth</text:span></text:p>
      <text:p text:style-name="Text_20_body">Export metrics using:</text:p>
      <text:p text:style-name="P12"><text:span text:style-name="Source_20_Text">Prometheus client</text:span></text:p>
      <text:p text:style-name="Text_20_body"><text:soft-page-break/>Build dashboard in Grafana.</text:p>
      <text:p text:style-name="P14"/>
      <text:h text:style-name="P15" text:outline-level="1">Questions To Answer</text:h>
      <text:list text:style-name="L15">
        <text:list-item>
          <text:p text:style-name="P21">How do engineers detect <text:span text:style-name="Strong_20_Emphasis">production bottlenecks</text:span>?</text:p>
        </text:list-item>
        <text:list-item>
          <text:p text:style-name="P21">What metrics reveal system overload?</text:p>
        </text:list-item>
      </text:list>
      <text:p text:style-name="P14"/>
      <text:h text:style-name="P15" text:outline-level="1">Phase 6 — Distributed Systems Concepts</text:h>
      <text:p text:style-name="Text_20_body">Now your system resembles a <text:span text:style-name="Strong_20_Emphasis">real distributed data pipeline.</text:span></text:p>
      <text:p text:style-name="P14"/>
      <text:h text:style-name="P15" text:outline-level="1">What To Study</text:h>
      <text:p text:style-name="P12"><text:span text:style-name="Source_20_Text">eventual consistency</text:span></text:p>
      <text:p text:style-name="P12"><text:span text:style-name="Source_20_Text">idempotent processing</text:span></text:p>
      <text:p text:style-name="P12"><text:span text:style-name="Source_20_Text">exactly-once vs at-least-once delivery</text:span></text:p>
      <text:p text:style-name="P12"><text:span text:style-name="Source_20_Text">distributed failure modes</text:span></text:p>
      <text:p text:style-name="P14"/>
      <text:h text:style-name="P15" text:outline-level="1">Experiments To Run</text:h>
      <text:h text:style-name="P11" text:outline-level="3">Experiment 9 — Duplicate Event Handling</text:h>
      <text:p text:style-name="Text_20_body">Simulate duplicate events.</text:p>
      <text:p text:style-name="Text_20_body">Design system to handle duplicates safely.</text:p>
      <text:p text:style-name="Text_20_body">Implement:</text:p>
      <text:p text:style-name="P12"><text:span text:style-name="Source_20_Text">idempotent inserts</text:span></text:p>
      <text:p text:style-name="P14"/>
      <text:h text:style-name="P11" text:outline-level="3">Experiment 10 — Horizontal Scaling</text:h>
      <text:p text:style-name="Text_20_body">Scale workers:</text:p>
      <text:p text:style-name="P12"><text:span text:style-name="Source_20_Text">1 worker</text:span></text:p>
      <text:p text:style-name="P12"><text:span text:style-name="Source_20_Text">4 workers</text:span></text:p>
      <text:p text:style-name="P12"><text:span text:style-name="Source_20_Text">8 workers</text:span></text:p>
      <text:p text:style-name="Text_20_body">Measure:</text:p>
      <text:p text:style-name="P12"><text:span text:style-name="Source_20_Text">processing throughput</text:span></text:p>
      <text:p text:style-name="P12"><text:soft-page-break/><text:span text:style-name="Source_20_Text">queue lag</text:span></text:p>
      <text:p text:style-name="P14"/>
      <text:h text:style-name="P15" text:outline-level="1">Questions To Answer</text:h>
      <text:list text:style-name="L16">
        <text:list-item>
          <text:p text:style-name="P22">Why is <text:span text:style-name="Strong_20_Emphasis">exactly-once processing extremely hard</text:span>?</text:p>
        </text:list-item>
        <text:list-item>
          <text:p text:style-name="P22">What are <text:span text:style-name="Strong_20_Emphasis">idempotent operations</text:span>?</text:p>
        </text:list-item>
      </text:list>
      <text:p text:style-name="P14"/>
      <text:h text:style-name="P15" text:outline-level="1">Phase 7 — Production Infrastructure</text:h>
      <text:p text:style-name="Text_20_body">Turn project into a deployable service.</text:p>
      <text:p text:style-name="P14"/>
      <text:h text:style-name="P15" text:outline-level="1">What To Study</text:h>
      <text:p text:style-name="P12"><text:span text:style-name="Source_20_Text">Docker</text:span></text:p>
      <text:p text:style-name="P12"><text:span text:style-name="Source_20_Text">container networking</text:span></text:p>
      <text:p text:style-name="P12"><text:span text:style-name="Source_20_Text">CI/CD</text:span></text:p>
      <text:p text:style-name="P12"><text:span text:style-name="Source_20_Text">service orchestration</text:span></text:p>
      <text:p text:style-name="Text_20_body">Tools:</text:p>
      <text:p text:style-name="P12"><text:span text:style-name="Source_20_Text">Docker</text:span></text:p>
      <text:p text:style-name="P12"><text:span text:style-name="Source_20_Text">Docker Compose</text:span></text:p>
      <text:p text:style-name="P12"><text:span text:style-name="Source_20_Text">GitHub Actions</text:span></text:p>
      <text:p text:style-name="P14"/>
      <text:h text:style-name="P15" text:outline-level="1">Experiments To Run</text:h>
      <text:h text:style-name="P11" text:outline-level="3">Experiment 11 — Full Containerized System</text:h>
      <text:p text:style-name="Text_20_body">Containerize:</text:p>
      <text:p text:style-name="P12"><text:span text:style-name="Source_20_Text">FastAPI</text:span></text:p>
      <text:p text:style-name="P12"><text:span text:style-name="Source_20_Text">PostgreSQL</text:span></text:p>
      <text:p text:style-name="P12"><text:span text:style-name="Source_20_Text">Redis</text:span></text:p>
      <text:p text:style-name="P12"><text:span text:style-name="Source_20_Text">worker service</text:span></text:p>
      <text:p text:style-name="P12"><text:span text:style-name="Source_20_Text">event generator</text:span></text:p>
      <text:p text:style-name="Text_20_body">Run using:</text:p>
      <text:p text:style-name="P12"><text:span text:style-name="Source_20_Text">docker-compose</text:span></text:p>
      <text:p text:style-name="P14"/>
      <text:h text:style-name="P11" text:outline-level="3"><text:soft-page-break/>Experiment 12 — CI Pipeline</text:h>
      <text:p text:style-name="Text_20_body">Create pipeline:</text:p>
      <text:p text:style-name="P12"><text:span text:style-name="Source_20_Text">test → build → deploy</text:span></text:p>
      <text:p text:style-name="Text_20_body">Use GitHub Actions.</text:p>
      <text:p text:style-name="P14"/>
      <text:h text:style-name="P15" text:outline-level="1">Final System Architecture</text:h>
      <text:p text:style-name="Text_20_body">After completing roadmap your system becomes:</text:p>
      <text:p text:style-name="P12"><text:span text:style-name="Source_20_Text">Event Generator</text:span></text:p>
      <text:p text:style-name="P12"><text:span text:style-name="Source_20_Text"><text:s text:c="8"/>│</text:span></text:p>
      <text:p text:style-name="P12"><text:span text:style-name="Source_20_Text"><text:s text:c="8"/>▼</text:span></text:p>
      <text:p text:style-name="P12"><text:span text:style-name="Source_20_Text">FastAPI Ingestion API</text:span></text:p>
      <text:p text:style-name="P12"><text:span text:style-name="Source_20_Text"><text:s text:c="8"/>│</text:span></text:p>
      <text:p text:style-name="P12"><text:span text:style-name="Source_20_Text"><text:s text:c="8"/>▼</text:span></text:p>
      <text:p text:style-name="P12"><text:span text:style-name="Source_20_Text">Redis / Kafka Queue</text:span></text:p>
      <text:p text:style-name="P12"><text:span text:style-name="Source_20_Text"><text:s text:c="8"/>│</text:span></text:p>
      <text:p text:style-name="P12"><text:span text:style-name="Source_20_Text"><text:s text:c="8"/>▼</text:span></text:p>
      <text:p text:style-name="P12"><text:span text:style-name="Source_20_Text">Worker Cluster</text:span></text:p>
      <text:p text:style-name="P12"><text:span text:style-name="Source_20_Text"><text:s text:c="8"/>│</text:span></text:p>
      <text:p text:style-name="P12"><text:span text:style-name="Source_20_Text"><text:s text:c="8"/>▼</text:span></text:p>
      <text:p text:style-name="P12"><text:span text:style-name="Source_20_Text">Partitioned PostgreSQL</text:span></text:p>
      <text:p text:style-name="P12"><text:span text:style-name="Source_20_Text"><text:s text:c="8"/>│</text:span></text:p>
      <text:p text:style-name="P12"><text:span text:style-name="Source_20_Text"><text:s text:c="8"/>▼</text:span></text:p>
      <text:p text:style-name="P12"><text:span text:style-name="Source_20_Text">ClickHouse Analytics</text:span></text:p>
      <text:p text:style-name="P12"><text:span text:style-name="Source_20_Text"><text:s text:c="8"/>│</text:span></text:p>
      <text:p text:style-name="P12"><text:span text:style-name="Source_20_Text"><text:s text:c="8"/>▼</text:span></text:p>
      <text:p text:style-name="P12"><text:span text:style-name="Source_20_Text">Metrics + Dashboards</text:span></text:p>
      <text:p text:style-name="Text_20_body">You will have built a <text:span text:style-name="Strong_20_Emphasis">mini version of a real analytics platform.</text:span></text:p>
      <text:p text:style-name="P14"/>
      <text:h text:style-name="P15" text:outline-level="1">What Skills This Actually Builds</text:h>
      <text:p text:style-name="Text_20_body">By finishing this roadmap you will understand:</text:p>
      <text:p text:style-name="P12"><text:span text:style-name="Source_20_Text">backend system design</text:span></text:p>
      <text:p text:style-name="P12"><text:soft-page-break/><text:span text:style-name="Source_20_Text">data pipeline architecture</text:span></text:p>
      <text:p text:style-name="P12"><text:span text:style-name="Source_20_Text">database performance engineering</text:span></text:p>
      <text:p text:style-name="P12"><text:span text:style-name="Source_20_Text">high-throughput ingestion</text:span></text:p>
      <text:p text:style-name="P12"><text:span text:style-name="Source_20_Text">distributed system behavior</text:span></text:p>
      <text:p text:style-name="P12"><text:span text:style-name="Source_20_Text">observability and debugging</text:span></text:p>
      <text:p text:style-name="Text_20_body">That skillset maps directly to roles like:</text:p>
      <text:p text:style-name="P12"><text:span text:style-name="Source_20_Text">Backend Engineer</text:span></text:p>
      <text:p text:style-name="P12"><text:span text:style-name="Source_20_Text">Data Engineer</text:span></text:p>
      <text:p text:style-name="P12"><text:span text:style-name="Source_20_Text">Infrastructure Engineer</text:span></text:p>
      <text:p text:style-name="P12"><text:span text:style-name="Source_20_Text">Observability Engineer</text:span></text:p>
      <text:p text:style-name="P14"/>
      <text:h text:style-name="P15" text:outline-level="1">The Most Important Mindset Shift</text:h>
      <text:p text:style-name="Text_20_body">Your goal is not:</text:p>
      <text:p text:style-name="P12"><text:span text:style-name="Source_20_Text">write code</text:span></text:p>
      <text:p text:style-name="Text_20_body">Your goal becomes:</text:p>
      <text:p text:style-name="P12"><text:span text:style-name="Source_20_Text">design systems</text:span></text:p>
      <text:p text:style-name="P12"><text:span text:style-name="Source_20_Text">measure systems</text:span></text:p>
      <text:p text:style-name="P12"><text:span text:style-name="Source_20_Text">debug systems</text:span></text:p>
      <text:p text:style-name="P12"><text:span text:style-name="Source_20_Text">scale systems</text:span></text:p>
      <text:p text:style-name="Text_20_body">That is what <text:span text:style-name="Strong_20_Emphasis">engineering mastery</text:span> actually means.</text:p>
      <text:p text:style-name="P14"/>
      <text:p text:style-name="Text_20_body"><text:span text:style-name="Strong_20_Emphasis"/></text:p>
      <text:h text:style-name="P10" text:outline-level="1">The Upgrade: Turn the Project into a <text:span text:style-name="Strong_20_Emphasis">Performance Engineering Lab</text:span></text:h>
      <text:p text:style-name="Text_20_body">Instead of just building the system, you systematically <text:span text:style-name="Strong_20_Emphasis">stress, measure, and redesign it</text:span>.</text:p>
      <text:p text:style-name="Text_20_body">Your repo becomes something like:</text:p>
      <text:p text:style-name="P12"><text:span text:style-name="Source_20_Text">event-analytics-system</text:span></text:p>
      <text:p text:style-name="P12"><text:span text:style-name="Source_20_Text">│</text:span></text:p>
      <text:p text:style-name="P12"><text:span text:style-name="Source_20_Text">├─ api/</text:span></text:p>
      <text:p text:style-name="P12"><text:span text:style-name="Source_20_Text">├─ worker/</text:span></text:p>
      <text:p text:style-name="P12"><text:span text:style-name="Source_20_Text">├─ sql/</text:span></text:p>
      <text:p text:style-name="P12"><text:span text:style-name="Source_20_Text">├─ infra/</text:span></text:p>
      <text:p text:style-name="P12"><text:span text:style-name="Source_20_Text">│</text:span></text:p>
      <text:p text:style-name="P12"><text:span text:style-name="Source_20_Text">├─ perf/</text:span></text:p>
      <text:p text:style-name="P12"><text:span text:style-name="Source_20_Text">│ <text:s text:c="2"/>├─ load-tests/</text:span></text:p>
      <text:p text:style-name="P12"><text:span text:style-name="Source_20_Text">│ <text:s text:c="2"/>├─ benchmark-results/</text:span></text:p>
      <text:p text:style-name="P12"><text:span text:style-name="Source_20_Text">│ <text:s text:c="2"/>├─ experiments/</text:span></text:p>
      <text:p text:style-name="P12"><text:span text:style-name="Source_20_Text">│ <text:s text:c="2"/>└─ investigation-notes/</text:span></text:p>
      <text:p text:style-name="P12"><text:span text:style-name="Source_20_Text">│</text:span></text:p>
      <text:p text:style-name="P12"><text:span text:style-name="Source_20_Text">└─ docs/</text:span></text:p>
      <text:p text:style-name="P12"><text:span text:style-name="Source_20_Text"><text:s text:c="4"/>├─ architecture.md</text:span></text:p>
      <text:p text:style-name="P12"><text:span text:style-name="Source_20_Text"><text:s text:c="4"/>├─ performance.md</text:span></text:p>
      <text:p text:style-name="P12"><text:span text:style-name="Source_20_Text"><text:s text:c="4"/>└─ scaling.md</text:span></text:p>
      <text:p text:style-name="Text_20_body">This makes your project look like <text:span text:style-name="Strong_20_Emphasis">real engineering work</text:span>, not a tutorial.</text:p>
      <text:p text:style-name="P14"/>
      <text:h text:style-name="P15" text:outline-level="1">Step 1 — Build a Real Load Testing Harness</text:h>
      <text:p text:style-name="Text_20_body">Right now your generator just creates events.</text:p>
      <text:p text:style-name="Text_20_body">Upgrade it to a <text:span text:style-name="Strong_20_Emphasis">load-testing tool</text:span>.</text:p>
      <text:p text:style-name="Text_20_body">Use tools like:</text:p>
      <text:list text:style-name="L17">
        <text:list-item>
          <text:p text:style-name="P23"><text:span text:style-name="Source_20_Text">locust</text:span></text:p>
        </text:list-item>
        <text:list-item>
          <text:p text:style-name="P23"><text:span text:style-name="Source_20_Text">k6</text:span></text:p>
        </text:list-item>
        <text:list-item>
          <text:p text:style-name="P23"><text:span text:style-name="Source_20_Text">wrk</text:span></text:p>
        </text:list-item>
        <text:list-item>
          <text:p text:style-name="P23"><text:soft-page-break/><text:span text:style-name="Source_20_Text">hey</text:span></text:p>
        </text:list-item>
      </text:list>
      <text:p text:style-name="Text_20_body">Example experiment:</text:p>
      <text:p text:style-name="Text_20_body">Test API ingestion throughput.</text:p>
      <text:p text:style-name="P12"><text:span text:style-name="Source_20_Text">50 events/sec</text:span></text:p>
      <text:p text:style-name="P12"><text:span text:style-name="Source_20_Text">200 events/sec</text:span></text:p>
      <text:p text:style-name="P12"><text:span text:style-name="Source_20_Text">500 events/sec</text:span></text:p>
      <text:p text:style-name="P12"><text:span text:style-name="Source_20_Text">1000 events/sec</text:span></text:p>
      <text:p text:style-name="Text_20_body">Measure:</text:p>
      <text:p text:style-name="P12"><text:span text:style-name="Source_20_Text">API latency</text:span></text:p>
      <text:p text:style-name="P12"><text:span text:style-name="Source_20_Text">database CPU</text:span></text:p>
      <text:p text:style-name="P12"><text:span text:style-name="Source_20_Text">database connections</text:span></text:p>
      <text:p text:style-name="P12"><text:span text:style-name="Source_20_Text">error rate</text:span></text:p>
      <text:p text:style-name="Text_20_body">Record results.</text:p>
      <text:p text:style-name="Text_20_body">Example table in your doc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rate</text:p>
            </table:table-cell>
            <table:table-cell table:style-name="Table1.A1" office:value-type="string">
              <text:p text:style-name="Table_20_Heading">avg latency</text:p>
            </table:table-cell>
            <table:table-cell table:style-name="Table1.A1" office:value-type="string">
              <text:p text:style-name="Table_20_Heading">p95 latency</text:p>
            </table:table-cell>
            <table:table-cell table:style-name="Table1.A1" office:value-type="string">
              <text:p text:style-name="Table_20_Heading">errors</text:p>
            </table:table-cell>
          </table:table-row>
        </table:table-header-rows>
        <table:table-row>
          <table:table-cell table:style-name="Table1.A1" office:value-type="string">
            <text:p text:style-name="Table_20_Contents">50/s</text:p>
          </table:table-cell>
          <table:table-cell table:style-name="Table1.A1" office:value-type="string">
            <text:p text:style-name="Table_20_Contents">10ms</text:p>
          </table:table-cell>
          <table:table-cell table:style-name="Table1.A1" office:value-type="string">
            <text:p text:style-name="Table_20_Contents">15ms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200/s</text:p>
          </table:table-cell>
          <table:table-cell table:style-name="Table1.A1" office:value-type="string">
            <text:p text:style-name="Table_20_Contents">18ms</text:p>
          </table:table-cell>
          <table:table-cell table:style-name="Table1.A1" office:value-type="string">
            <text:p text:style-name="Table_20_Contents">40ms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500/s</text:p>
          </table:table-cell>
          <table:table-cell table:style-name="Table1.A1" office:value-type="string">
            <text:p text:style-name="Table_20_Contents">75ms</text:p>
          </table:table-cell>
          <table:table-cell table:style-name="Table1.A1" office:value-type="string">
            <text:p text:style-name="Table_20_Contents">210ms</text:p>
          </table:table-cell>
          <table:table-cell table:style-name="Table1.A1" office:value-type="string">
            <text:p text:style-name="Table_20_Contents">3%</text:p>
          </table:table-cell>
        </table:table-row>
      </table:table>
      <text:p text:style-name="Text_20_body">Now your project shows <text:span text:style-name="Strong_20_Emphasis">engineering analysis</text:span>.</text:p>
      <text:p text:style-name="P14"/>
      <text:h text:style-name="P15" text:outline-level="1">Step 2 — Create a Dataset That Actually Breaks Things</text:h>
      <text:p text:style-name="Text_20_body">Most learning projects only store thousands of rows.</text:p>
      <text:p text:style-name="Text_20_body">That teaches almost nothing.</text:p>
      <text:p text:style-name="Text_20_body">Generate:</text:p>
      <text:p text:style-name="P12"><text:span text:style-name="Source_20_Text">1 million events</text:span></text:p>
      <text:p text:style-name="P12"><text:span text:style-name="Source_20_Text">5 million events</text:span></text:p>
      <text:p text:style-name="P12"><text:span text:style-name="Source_20_Text">20 million events</text:span></text:p>
      <text:p text:style-name="Text_20_body">Now run your analytics queries again.</text:p>
      <text:p text:style-name="Text_20_body">You will observe:</text:p>
      <text:list text:style-name="L18">
        <text:list-item>
          <text:p text:style-name="P24">different query plans</text:p>
        </text:list-item>
        <text:list-item>
          <text:p text:style-name="P24"><text:soft-page-break/>slow queries</text:p>
        </text:list-item>
        <text:list-item>
          <text:p text:style-name="P24">memory pressure</text:p>
        </text:list-item>
      </text:list>
      <text:p text:style-name="Text_20_body">This is where <text:span text:style-name="Strong_20_Emphasis">real database understanding begins</text:span>.</text:p>
      <text:p text:style-name="P14"/>
      <text:h text:style-name="P15" text:outline-level="1">Step 3 — Write a Performance Investigation Report</text:h>
      <text:p text:style-name="Text_20_body">Create a document:</text:p>
      <text:p text:style-name="P12"><text:span text:style-name="Source_20_Text">docs/performance.md</text:span></text:p>
      <text:p text:style-name="Text_20_body">Structure it like an engineering investigation.</text:p>
      <text:p text:style-name="Text_20_body">Example:</text:p>
      <text:h text:style-name="P25" text:outline-level="2">Baseline System</text:h>
      <text:p text:style-name="Text_20_body">Architecture:</text:p>
      <text:p text:style-name="P12"><text:span text:style-name="Source_20_Text">Generator → FastAPI → PostgreSQL</text:span></text:p>
      <text:p text:style-name="Text_20_body">Dataset:</text:p>
      <text:p text:style-name="P12"><text:span text:style-name="Source_20_Text">5M events</text:span></text:p>
      <text:p text:style-name="Text_20_body">Observed bottlenecks:</text:p>
      <text:p text:style-name="P12"><text:span text:style-name="Source_20_Text">DB connection saturation</text:span></text:p>
      <text:p text:style-name="P12"><text:span text:style-name="Source_20_Text">slow analytics queries</text:span></text:p>
      <text:p text:style-name="P14"/>
      <text:h text:style-name="P25" text:outline-level="2">Experiment 1 — Add Index</text:h>
      <text:p text:style-name="Text_20_body">Test query:</text:p>
      <text:p text:style-name="P12"><text:span text:style-name="Source_20_Text">events per hour</text:span></text:p>
      <text:p text:style-name="Text_20_body">Before index:</text:p>
      <text:p text:style-name="P12"><text:span text:style-name="Source_20_Text">execution time: 850ms</text:span></text:p>
      <text:p text:style-name="Text_20_body">After index:</text:p>
      <text:p text:style-name="P12"><text:span text:style-name="Source_20_Text">execution time: 42ms</text:span></text:p>
      <text:p text:style-name="Text_20_body">Conclusion:</text:p>
      <text:p text:style-name="P12"><text:span text:style-name="Source_20_Text">Composite index drastically improves time-bucket queries</text:span></text:p>
      <text:p text:style-name="P14"/>
      <text:h text:style-name="P25" text:outline-level="2"><text:soft-page-break/>Experiment 2 — Partition Tables</text:h>
      <text:p text:style-name="Text_20_body">Result:</text:p>
      <text:p text:style-name="P12"><text:span text:style-name="Source_20_Text">query time improvement: 3x</text:span></text:p>
      <text:p text:style-name="Text_20_body">Observation:</text:p>
      <text:p text:style-name="P12"><text:span text:style-name="Source_20_Text">planner prunes partitions</text:span></text:p>
      <text:p text:style-name="P14"/>
      <text:h text:style-name="P15" text:outline-level="1">Step 4 — Demonstrate a Real Bottleneck</text:h>
      <text:p text:style-name="Text_20_body">The best learning happens when <text:span text:style-name="Strong_20_Emphasis">the system breaks</text:span>.</text:p>
      <text:p text:style-name="Text_20_body">Try pushing ingestion to:</text:p>
      <text:p text:style-name="P12"><text:span text:style-name="Source_20_Text">1000 events/sec</text:span></text:p>
      <text:p text:style-name="Text_20_body">You will likely hit:</text:p>
      <text:list text:style-name="L19">
        <text:list-item>
          <text:p text:style-name="P26">DB connection exhaustion</text:p>
        </text:list-item>
        <text:list-item>
          <text:p text:style-name="P26">CPU spikes</text:p>
        </text:list-item>
        <text:list-item>
          <text:p text:style-name="P26">slow inserts</text:p>
        </text:list-item>
      </text:list>
      <text:p text:style-name="Text_20_body">Document:</text:p>
      <text:p text:style-name="P12"><text:span text:style-name="Source_20_Text">why it happened</text:span></text:p>
      <text:p text:style-name="P12"><text:span text:style-name="Source_20_Text">how you fixed it</text:span></text:p>
      <text:p text:style-name="Text_20_body">Examples of fixes:</text:p>
      <text:list text:style-name="L20">
        <text:list-item>
          <text:p text:style-name="P27">connection pooling</text:p>
        </text:list-item>
        <text:list-item>
          <text:p text:style-name="P27">batch inserts</text:p>
        </text:list-item>
        <text:list-item>
          <text:p text:style-name="P27">queue-based ingestion</text:p>
        </text:list-item>
      </text:list>
      <text:p text:style-name="P14"/>
      <text:h text:style-name="P15" text:outline-level="1">Step 5 — Show Architectural Evolution</text:h>
      <text:p text:style-name="Text_20_body">Document the evolution of the system.</text:p>
      <text:h text:style-name="P11" text:outline-level="3">Version 1</text:h>
      <text:p text:style-name="P12"><text:span text:style-name="Source_20_Text">Generator → API → PostgreSQL</text:span></text:p>
      <text:h text:style-name="P11" text:outline-level="3">Version 2</text:h>
      <text:p text:style-name="P12"><text:span text:style-name="Source_20_Text">Generator → API → Queue → Worker → PostgreSQL</text:span></text:p>
      <text:h text:style-name="P11" text:outline-level="3"><text:soft-page-break/>Version 3</text:h>
      <text:p text:style-name="P12"><text:span text:style-name="Source_20_Text">Generator → API → Queue → Worker → Partitioned DB</text:span></text:p>
      <text:p text:style-name="Text_20_body">This demonstrates <text:span text:style-name="Strong_20_Emphasis">architectural thinking</text:span>, which engineers care about far more than raw coding.</text:p>
      <text:p text:style-name="P14"/>
      <text:h text:style-name="P15" text:outline-level="1">Step 6 — Add Observability</text:h>
      <text:p text:style-name="Text_20_body">Add real metrics.</text:p>
      <text:p text:style-name="Text_20_body">Track:</text:p>
      <text:p text:style-name="P12"><text:span text:style-name="Source_20_Text">events ingested per second</text:span></text:p>
      <text:p text:style-name="P12"><text:span text:style-name="Source_20_Text">API latency</text:span></text:p>
      <text:p text:style-name="P12"><text:span text:style-name="Source_20_Text">queue depth</text:span></text:p>
      <text:p text:style-name="P12"><text:span text:style-name="Source_20_Text">DB query time</text:span></text:p>
      <text:p text:style-name="Text_20_body">Tools:</text:p>
      <text:list text:style-name="L21">
        <text:list-item>
          <text:p text:style-name="P28">Prometheus</text:p>
        </text:list-item>
        <text:list-item>
          <text:p text:style-name="P28">Grafana</text:p>
        </text:list-item>
      </text:list>
      <text:p text:style-name="Text_20_body">Now your system can <text:span text:style-name="Strong_20_Emphasis">explain itself</text:span>.</text:p>
      <text:p text:style-name="Text_20_body">That is how real systems are operated.</text:p>
      <text:p text:style-name="P14"/>
      <text:h text:style-name="P15" text:outline-level="1">Step 7 — Write an Engineering Postmortem</text:h>
      <text:p text:style-name="Text_20_body">Create:</text:p>
      <text:p text:style-name="P12"><text:span text:style-name="Source_20_Text">docs/scaling-lessons.md</text:span></text:p>
      <text:p text:style-name="Text_20_body">Example:</text:p>
      <text:h text:style-name="P25" text:outline-level="2">Lessons Learned</text:h>
      <text:h text:style-name="P11" text:outline-level="3">PostgreSQL Write Throughput</text:h>
      <text:p text:style-name="Text_20_body">Single inserts saturate at ~400 events/sec.</text:p>
      <text:p text:style-name="Text_20_body">Batch inserts increased throughput to ~3500 events/sec.</text:p>
      <text:p text:style-name="Text_20_body">Reason:</text:p>
      <text:p text:style-name="P12"><text:span text:style-name="Source_20_Text">reduced transaction overhead</text:span></text:p>
      <text:p text:style-name="P14"/>
      <text:h text:style-name="P11" text:outline-level="3"><text:soft-page-break/>Query Performance</text:h>
      <text:p text:style-name="Text_20_body">Time-bucket queries degrade beyond 10M rows without partitioning.</text:p>
      <text:p text:style-name="Text_20_body">Partitioning improved query speed by ~70%.</text:p>
      <text:p text:style-name="P14"/>
      <text:p text:style-name="Text_20_body">This kind of documentation makes your repo look like something built by a <text:span text:style-name="Strong_20_Emphasis">senior engineer</text:span>, not just a learner.</text:p>
      <text:p text:style-name="P14"/>
      <text:h text:style-name="P15" text:outline-level="1">What This Upgrade Signals to Employers</text:h>
      <text:p text:style-name="Text_20_body">Most candidates show:</text:p>
      <text:p text:style-name="P12"><text:span text:style-name="Source_20_Text">"I built an API."</text:span></text:p>
      <text:p text:style-name="Text_20_body">Your project would show:</text:p>
      <text:p text:style-name="P12"><text:span text:style-name="Source_20_Text">I designed a system</text:span></text:p>
      <text:p text:style-name="P12"><text:span text:style-name="Source_20_Text">I stress tested it</text:span></text:p>
      <text:p text:style-name="P12"><text:span text:style-name="Source_20_Text">I analyzed the bottlenecks</text:span></text:p>
      <text:p text:style-name="P12"><text:span text:style-name="Source_20_Text">I redesigned the architecture</text:span></text:p>
      <text:p text:style-name="Text_20_body">That difference is enormous.</text:p>
      <text:p text:style-name="Text_20_body">It demonstrates:</text:p>
      <text:list text:style-name="L22">
        <text:list-item>
          <text:p text:style-name="P29">systems thinking</text:p>
        </text:list-item>
        <text:list-item>
          <text:p text:style-name="P29">performance engineering</text:p>
        </text:list-item>
        <text:list-item>
          <text:p text:style-name="P29">database understanding</text:p>
        </text:list-item>
        <text:list-item>
          <text:p text:style-name="P29">architecture skills</text:p>
        </text:list-item>
      </text:list>
      <text:p text:style-name="P14"/>
      <text:h text:style-name="P15" text:outline-level="1">One More Upgrade (The One That Really Impresses Engineers)</text:h>
      <text:p text:style-name="Text_20_body">Add a <text:span text:style-name="Strong_20_Emphasis">real-time analytics dashboard</text:span>.</text:p>
      <text:p text:style-name="Text_20_body">Example:</text:p>
      <text:p text:style-name="P12"><text:span text:style-name="Source_20_Text">top pages</text:span></text:p>
      <text:p text:style-name="P12"><text:span text:style-name="Source_20_Text">events per second</text:span></text:p>
      <text:p text:style-name="P12"><text:span text:style-name="Source_20_Text">active users</text:span></text:p>
      <text:p text:style-name="Text_20_body">Architecture:</text:p>
      <text:p text:style-name="P12"><text:soft-page-break/><text:span text:style-name="Source_20_Text">Event Generator</text:span></text:p>
      <text:p text:style-name="P12"><text:span text:style-name="Source_20_Text"><text:s text:c="8"/>│</text:span></text:p>
      <text:p text:style-name="P12"><text:span text:style-name="Source_20_Text"><text:s text:c="8"/>▼</text:span></text:p>
      <text:p text:style-name="P12"><text:span text:style-name="Source_20_Text">FastAPI Ingestion</text:span></text:p>
      <text:p text:style-name="P12"><text:span text:style-name="Source_20_Text"><text:s text:c="8"/>│</text:span></text:p>
      <text:p text:style-name="P12"><text:span text:style-name="Source_20_Text"><text:s text:c="8"/>▼</text:span></text:p>
      <text:p text:style-name="P12"><text:span text:style-name="Source_20_Text">Queue</text:span></text:p>
      <text:p text:style-name="P12"><text:span text:style-name="Source_20_Text"><text:s text:c="8"/>│</text:span></text:p>
      <text:p text:style-name="P12"><text:span text:style-name="Source_20_Text"><text:s text:c="8"/>▼</text:span></text:p>
      <text:p text:style-name="P12"><text:span text:style-name="Source_20_Text">Worker</text:span></text:p>
      <text:p text:style-name="P12"><text:span text:style-name="Source_20_Text"><text:s text:c="8"/>│</text:span></text:p>
      <text:p text:style-name="P12"><text:span text:style-name="Source_20_Text"><text:s text:c="8"/>▼</text:span></text:p>
      <text:p text:style-name="P12"><text:span text:style-name="Source_20_Text">ClickHouse</text:span></text:p>
      <text:p text:style-name="P12"><text:span text:style-name="Source_20_Text"><text:s text:c="8"/>│</text:span></text:p>
      <text:p text:style-name="P12"><text:span text:style-name="Source_20_Text"><text:s text:c="8"/>▼</text:span></text:p>
      <text:p text:style-name="P12"><text:span text:style-name="Source_20_Text">Grafana Dashboard</text:span></text:p>
      <text:p text:style-name="Text_20_body">Now you have built a <text:span text:style-name="Strong_20_Emphasis">mini analytics platform</text:span>.</text:p>
      <text:p text:style-name="Text_20_body">Which is extremely close to:</text:p>
      <text:list text:style-name="L23">
        <text:list-item>
          <text:p text:style-name="P30">Datadog</text:p>
        </text:list-item>
        <text:list-item>
          <text:p text:style-name="P30">Amplitude</text:p>
        </text:list-item>
        <text:list-item>
          <text:p text:style-name="P30">Segment</text:p>
        </text:list-item>
        <text:list-item>
          <text:p text:style-name="P30">Snowplow</text:p>
        </text:list-item>
      </text:list>
      <text:p text:style-name="P1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21:17:14.500649171</meta:creation-date>
    <dc:date>2026-03-11T21:24:20.969643161</dc:date>
    <meta:editing-duration>PT4M7S</meta:editing-duration>
    <meta:editing-cycles>3</meta:editing-cycles>
    <meta:generator>LibreOffice/25.8.4.2$Linux_X86_64 LibreOffice_project/580$Build-2</meta:generator>
    <meta:document-statistic meta:table-count="1" meta:image-count="0" meta:object-count="0" meta:page-count="30" meta:paragraph-count="792" meta:word-count="2399" meta:character-count="15997" meta:non-whitespace-character-count="13989"/>
  </office:meta>
</office:document-meta>
</file>